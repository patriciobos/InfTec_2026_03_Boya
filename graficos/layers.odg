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1.65cm" fo:min-width="18.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2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61cm"/>
      <style:paragraph-properties style:writing-mode="lr-tb"/>
    </style:style>
    <style:style style:name="gr6" style:family="graphic" style:parent-style-name="objectwithoutfill" style:list-style-name="L1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="Puntas_20_de_20_flecha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2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9cm"/>
      <style:paragraph-properties style:writing-mode="lr-tb"/>
    </style:style>
    <style:style style:name="P1" style:family="paragraph">
      <style:paragraph-properties fo:margin-top="0cm" fo:margin-bottom="0.3cm"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dee6ef"/>
      <style:paragraph-properties fo:margin-top="0cm" fo:margin-bottom="0.3cm"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none" draw:fill-color="#ffffff"/>
      <style:paragraph-properties fo:margin-top="0cm" fo:margin-bottom="0.3cm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top="0cm" fo:margin-bottom="0.3cm" style:writing-mode="lr-tb"/>
      <style:text-properties fo:font-size="5.40000009536743pt" style:font-size-asian="5.40000009536743pt" style:font-size-complex="5.40000009536743pt"/>
    </style:style>
    <style:style style:name="P6" style:family="paragraph">
      <loext:graphic-properties draw:fill="none"/>
      <style:paragraph-properties fo:margin-left="0cm" fo:margin-right="0cm" fo:margin-top="0cm" fo:margin-bottom="0.3cm" fo:text-align="center" fo:text-indent="0cm" style:writing-mode="lr-tb"/>
      <style:text-properties style:font-name="Liberation Sans" fo:font-size="14pt" style:letter-kerning="true" style:font-name-asian="Noto Sans CJK SC" style:font-size-asian="14pt" style:font-name-complex="Noto Sans Devanagari" style:font-size-complex="14pt"/>
    </style:style>
    <style:style style:name="P7" style:family="paragraph">
      <loext:graphic-properties draw:fill="none"/>
      <style:paragraph-properties fo:margin-top="0cm" fo:margin-bottom="0.3cm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top="0cm" fo:margin-bottom="0.3cm" fo:text-align="start"/>
    </style:style>
    <style:style style:name="P9" style:family="paragraph">
      <loext:graphic-properties draw:fill="none" draw:fill-color="#ffffff"/>
      <style:paragraph-properties fo:margin-top="0cm" fo:margin-bottom="0.3cm" fo:text-align="start" style:writing-mode="lr-tb"/>
      <style:text-properties fo:font-size="5.40000009536743pt" style:font-size-asian="5.40000009536743pt" style:font-size-complex="5.40000009536743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2cm" svg:x="0.062cm" svg:y="3.687cm">
          <text:p text:style-name="P1"><text:span text:style-name="T1">Capa de coordinación</text:span></text:p>
          <text:p text:style-name="P1"><text:span text:style-name="T2">main.py, enrutador de eventos, planificador de tareas central y reporte de estad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.062cm" svg:y="7.312cm">
          <text:p text:style-name="P1"><text:span text:style-name="T1">Capa de Máquinas de Estados Finitos</text:span></text:p>
          <text:p text:style-name="P1"><text:span text:style-name="T2">archivos *_fsm.py: estados, transiciones, acciones, validación y repo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.062cm" svg:y="10.937cm">
          <text:p text:style-name="P1"><text:span text:style-name="T1">Capa de bajo nivel</text:span></text:p>
          <text:p text:style-name="P1"><text:span text:style-name="T2">archivos *_LL.py: drivers, parseo, adquisición, transporte y procesamiento específico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5cm" svg:height="0.725cm" svg:x="12.262cm" svg:y="6.115cm">
          <draw:text-box>
            <text:p text:style-name="P3"><text:span text:style-name="T3">Señales </text:span><text:span text:style-name="T4">SIG_* a las MEF</text:span></text:p>
          </draw:text-box>
        </draw:frame>
        <draw:frame draw:style-name="gr3" draw:text-style-name="P4" draw:layer="layout" svg:width="6.6cm" svg:height="0.849cm" svg:x="12.462cm" svg:y="9.745cm">
          <draw:text-box>
            <text:p text:style-name="P3"><text:span text:style-name="T4">Llamadas a drivers y métodos</text:span></text:p>
          </draw:text-box>
        </draw:frame>
        <draw:frame draw:style-name="gr4" draw:text-style-name="P5" draw:layer="layout" svg:width="10.588cm" svg:height="0.763cm" svg:x="1.412cm" svg:y="6.096cm">
          <draw:text-box>
            <text:p text:style-name="P3"><text:span text:style-name="T5">Reporte de eventos a través de colas de mensajes</text:span></text:p>
          </draw:text-box>
        </draw:frame>
        <draw:frame draw:style-name="gr5" draw:text-style-name="P5" draw:layer="layout" svg:width="8.338cm" svg:height="0.725cm" svg:x="1.412cm" svg:y="9.807cm">
          <draw:text-box>
            <text:p text:style-name="P3"><text:span text:style-name="T5">Reporte de estado (OK / ERROR)</text:span></text:p>
          </draw:text-box>
        </draw:frame>
        <draw:custom-shape draw:style-name="gr1" draw:text-style-name="P2" draw:layer="layout" svg:width="19cm" svg:height="2cm" svg:x="0.062cm" svg:y="14.562cm">
          <text:p text:style-name="P1"><text:span text:style-name="T1">Capa física</text:span></text:p>
          <text:p text:style-name="P1"><text:span text:style-name="T2">sensores, placa de audio, módem satelital, controlador solar, almacenamiento e interfac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0.062cm" svg:y="0.062cm">
          <text:p text:style-name="P1"><text:span text:style-name="T1">Capa de persistencia y telemetría</text:span></text:p>
          <text:p text:style-name="P1"><text:span text:style-name="T2">configuración, logs, mediciones JSONL, audio WAV, resultados JSON y payloads binario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165cm" svg:y1="2.112cm" svg:x2="12.172cm" svg:y2="3.64cm">
          <text:p/>
        </draw:line>
        <draw:line draw:style-name="gr7" draw:text-style-name="P7" draw:layer="layout" svg:x1="1.073cm" svg:y1="3.656cm" svg:x2="1.062cm" svg:y2="2.112cm">
          <text:p/>
        </draw:line>
        <draw:line draw:style-name="gr7" draw:text-style-name="P7" draw:layer="layout" svg:x1="12.165cm" svg:y1="5.734cm" svg:x2="12.172cm" svg:y2="7.262cm">
          <text:p/>
        </draw:line>
        <draw:line draw:style-name="gr7" draw:text-style-name="P7" draw:layer="layout" svg:x1="1.074cm" svg:y1="7.278cm" svg:x2="1.063cm" svg:y2="5.734cm">
          <text:p/>
        </draw:line>
        <draw:line draw:style-name="gr7" draw:text-style-name="P7" draw:layer="layout" svg:x1="12.165cm" svg:y1="9.363cm" svg:x2="12.172cm" svg:y2="10.891cm">
          <text:p/>
        </draw:line>
        <draw:line draw:style-name="gr7" draw:text-style-name="P7" draw:layer="layout" svg:x1="1.075cm" svg:y1="10.904cm" svg:x2="1.064cm" svg:y2="9.36cm">
          <text:p/>
        </draw:line>
        <draw:line draw:style-name="gr8" draw:text-style-name="P7" draw:layer="layout" svg:x1="1.076cm" svg:y1="14.527cm" svg:x2="1.065cm" svg:y2="12.983cm">
          <text:p/>
        </draw:line>
        <draw:frame draw:style-name="gr9" draw:text-style-name="P4" draw:layer="layout" svg:width="6.35cm" svg:height="0.725cm" svg:x="12.462cm" svg:y="2.484cm">
          <draw:text-box>
            <text:p text:style-name="P3"><text:span text:style-name="T4">Lectura de parámetros</text:span></text:p>
          </draw:text-box>
        </draw:frame>
        <draw:frame draw:style-name="gr10" draw:text-style-name="P5" draw:layer="layout" svg:width="7.088cm" svg:height="0.725cm" svg:x="1.412cm" svg:y="2.484cm">
          <draw:text-box>
            <text:p text:style-name="P3"><text:span text:style-name="T5">Escritura en /logs, /data y /storage</text:span></text:p>
          </draw:text-box>
        </draw:frame>
        <draw:frame draw:style-name="gr11" draw:text-style-name="P9" draw:layer="layout" svg:width="11.088cm" svg:height="0.725cm" svg:x="1.512cm" svg:y="13.441cm">
          <draw:text-box>
            <text:p text:style-name="P8"><text:span text:style-name="T5">Acceso al hardware: lectura y escritura de registr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9.1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1T10:55:59.103424311</meta:creation-date>
    <dc:date>2026-06-27T13:26:00.695245042</dc:date>
    <meta:editing-duration>PT44M53S</meta:editing-duration>
    <meta:editing-cycles>10</meta:editing-cycles>
    <meta:generator>LibreOffice/7.3.7.2$Linux_X86_64 LibreOffice_project/30$Build-2</meta:generator>
    <meta:document-statistic meta:object-count="19"/>
  </office:meta>
</office:document-meta>
</file>