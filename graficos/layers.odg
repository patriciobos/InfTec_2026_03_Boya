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dee6ef" draw:textarea-horizontal-align="justify" draw:textarea-vertical-align="middle" draw:auto-grow-height="false" fo:min-height="1.65cm" fo:min-width="18.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3cm"/>
      <style:paragraph-properties style:writing-mode="lr-tb"/>
    </style:style>
    <style:style style:name="gr6" style:family="graphic" style:parent-style-name="objectwithoutfill" style:list-style-name="L1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8" style:family="graphic" style:parent-style-name="objectwithoutfill">
      <style:graphic-properties svg:stroke-width="0.1cm" draw:marker-start="Puntas_20_de_20_flecha_20_1" draw:marker-start-width="0.35cm" draw:marker-end="Arrowheads_20_1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22cm"/>
      <style:paragraph-properties style:writing-mode="lr-tb"/>
    </style:style>
    <style:style style:name="P1" style:family="paragraph">
      <style:paragraph-properties fo:margin-top="0cm" fo:margin-bottom="0.3cm"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dee6ef"/>
      <style:paragraph-properties fo:margin-top="0cm" fo:margin-bottom="0.3cm"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none" draw:fill-color="#ffffff"/>
      <style:paragraph-properties fo:margin-top="0cm" fo:margin-bottom="0.3cm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top="0cm" fo:margin-bottom="0.3cm" style:writing-mode="lr-tb"/>
      <style:text-properties fo:font-size="5.40000009536743pt" style:font-size-asian="5.40000009536743pt" style:font-size-complex="5.40000009536743pt"/>
    </style:style>
    <style:style style:name="P6" style:family="paragraph">
      <style:paragraph-properties fo:margin-left="0cm" fo:margin-right="0cm" fo:margin-top="0cm" fo:margin-bottom="0.3cm" fo:text-align="center" fo:text-indent="0cm"/>
      <style:text-properties style:font-name="Liberation Sans" fo:font-size="14pt" style:letter-kerning="true" style:font-name-asian="Noto Sans CJK SC" style:font-size-asian="14pt" style:font-name-complex="Noto Sans Devanagari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.3cm" fo:text-align="center" fo:text-indent="0cm"/>
      <style:text-properties style:font-name="Liberation Sans" fo:font-size="14pt" style:letter-kerning="true" style:font-name-asian="Noto Sans CJK SC" style:font-size-asian="14pt" style:font-name-complex="Noto Sans Devanagari" style:font-size-complex="14pt"/>
    </style:style>
    <style:style style:name="P8" style:family="paragraph">
      <style:paragraph-properties fo:margin-top="0cm" fo:margin-bottom="0.3cm" fo:text-align="center"/>
    </style:style>
    <style:style style:name="P9" style:family="paragraph">
      <loext:graphic-properties draw:fill="none"/>
      <style:paragraph-properties fo:margin-top="0cm" fo:margin-bottom="0.3cm" fo:text-align="center"/>
      <style:text-properties fo:font-size="14pt" style:font-size-asian="14pt" style:font-size-complex="14pt"/>
    </style:style>
    <style:style style:name="P10" style:family="paragraph">
      <style:paragraph-properties fo:margin-top="0cm" fo:margin-bottom="0.3cm" fo:text-align="start"/>
    </style:style>
    <style:style style:name="P11" style:family="paragraph">
      <loext:graphic-properties draw:fill="none" draw:fill-color="#ffffff"/>
      <style:paragraph-properties fo:margin-top="0cm" fo:margin-bottom="0.3cm" fo:text-align="start" style:writing-mode="lr-tb"/>
      <style:text-properties fo:font-size="5.40000009536743pt" style:font-size-asian="5.40000009536743pt" style:font-size-complex="5.40000009536743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" fo:font-size="12pt" style:letter-kerning="true" style:font-name-asian="Noto Sans CJK SC" style:font-size-asian="12pt" style:font-name-complex="Noto Sans Devanagari" style:font-size-complex="1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2cm" svg:x="0cm" svg:y="3.625cm">
          <text:p text:style-name="P1"><text:span text:style-name="T1">Capa de coordinación</text:span></text:p>
          <text:p text:style-name="P1"><text:span text:style-name="T2">main.py, enrutador de eventos, planificador de tareas central y reporte de estad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2cm" svg:x="0cm" svg:y="7.25cm">
          <text:p text:style-name="P1"><text:span text:style-name="T1">Capa de Máquinas de Estados Finitos</text:span></text:p>
          <text:p text:style-name="P1"><text:span text:style-name="T2">archivos *_fsm.py: estados, transiciones, acciones, validación y repo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2cm" svg:x="0cm" svg:y="10.875cm">
          <text:p text:style-name="P1"><text:span text:style-name="T1">Capa de bajo nivel</text:span></text:p>
          <text:p text:style-name="P1"><text:span text:style-name="T2">archivos *_LL.py: drivers, parseo, adquisición, transporte y procesamiento específico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5cm" svg:height="1.099cm" svg:x="12.2cm" svg:y="5.975cm">
          <draw:text-box>
            <text:p text:style-name="P3"><text:span text:style-name="T3">Señales </text:span><text:span text:style-name="T4">SIG_* a las MEF</text:span></text:p>
          </draw:text-box>
        </draw:frame>
        <draw:frame draw:style-name="gr3" draw:text-style-name="P4" draw:layer="layout" svg:width="6.6cm" svg:height="0.849cm" svg:x="12.4cm" svg:y="9.689cm">
          <draw:text-box>
            <text:p text:style-name="P3"><text:span text:style-name="T4">Llamadas a drivers y métodos</text:span></text:p>
          </draw:text-box>
        </draw:frame>
        <draw:frame draw:style-name="gr4" draw:text-style-name="P5" draw:layer="layout" svg:width="6.5cm" svg:height="1.199cm" svg:x="1.35cm" svg:y="5.925cm">
          <draw:text-box>
            <text:p text:style-name="P3"><text:span text:style-name="T5">Reporte de eventos a través de colas de mensajes</text:span></text:p>
          </draw:text-box>
        </draw:frame>
        <draw:frame draw:style-name="gr5" draw:text-style-name="P5" draw:layer="layout" svg:width="4.25cm" svg:height="1.273cm" svg:x="1.35cm" svg:y="9.477cm">
          <draw:text-box>
            <text:p text:style-name="P3"><text:span text:style-name="T5">Reporte de estado</text:span><text:span text:style-name="T5"><text:line-break/></text:span><text:span text:style-name="T5">(OK / ERROR)</text:span></text:p>
          </draw:text-box>
        </draw:frame>
        <draw:custom-shape draw:style-name="gr1" draw:text-style-name="P2" draw:layer="layout" svg:width="19cm" svg:height="2cm" svg:x="0cm" svg:y="14.5cm">
          <text:p text:style-name="P1"><text:span text:style-name="T1">Capa física</text:span></text:p>
          <text:p text:style-name="P1"><text:span text:style-name="T2">sensores, placa de audio, módem satelital, controlador solar, almacenamiento e interfac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2cm" svg:x="0cm" svg:y="0cm">
          <text:p text:style-name="P1"><text:span text:style-name="T1">Capa de persistencia y telemetría</text:span></text:p>
          <text:p text:style-name="P1"><text:span text:style-name="T2">configuración, logs, mediciones JSONL, audio WAV, resultados JSON y payloads binari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.103cm" svg:y1="2.05cm" svg:x2="12.11cm" svg:y2="3.578cm">
          <text:p text:style-name="P6"/>
        </draw:line>
        <draw:line draw:style-name="gr7" draw:text-style-name="P9" draw:layer="layout" svg:x1="1.011cm" svg:y1="3.594cm" svg:x2="1cm" svg:y2="2.05cm">
          <text:p text:style-name="P8"><text:span text:style-name="T6"/></text:p>
        </draw:line>
        <draw:line draw:style-name="gr7" draw:text-style-name="P9" draw:layer="layout" svg:x1="12.103cm" svg:y1="5.672cm" svg:x2="12.11cm" svg:y2="7.2cm">
          <text:p/>
        </draw:line>
        <draw:line draw:style-name="gr7" draw:text-style-name="P9" draw:layer="layout" svg:x1="1.012cm" svg:y1="7.216cm" svg:x2="1.001cm" svg:y2="5.672cm">
          <text:p/>
        </draw:line>
        <draw:line draw:style-name="gr7" draw:text-style-name="P9" draw:layer="layout" svg:x1="12.103cm" svg:y1="9.301cm" svg:x2="12.11cm" svg:y2="10.829cm">
          <text:p/>
        </draw:line>
        <draw:line draw:style-name="gr7" draw:text-style-name="P9" draw:layer="layout" svg:x1="1.013cm" svg:y1="10.842cm" svg:x2="1.002cm" svg:y2="9.298cm">
          <text:p/>
        </draw:line>
        <draw:line draw:style-name="gr8" draw:text-style-name="P9" draw:layer="layout" svg:x1="1.014cm" svg:y1="14.465cm" svg:x2="1.003cm" svg:y2="12.921cm">
          <text:p/>
        </draw:line>
        <draw:frame draw:style-name="gr9" draw:text-style-name="P4" draw:layer="layout" svg:width="6.35cm" svg:height="0.798cm" svg:x="12.4cm" svg:y="2.465cm">
          <draw:text-box>
            <text:p text:style-name="P3"><text:span text:style-name="T4">Lect</text:span><text:span text:style-name="T4">ura </text:span><text:span text:style-name="T4">de </text:span><text:span text:style-name="T4">pará</text:span><text:span text:style-name="T4">metr</text:span><text:span text:style-name="T4">os</text:span></text:p>
          </draw:text-box>
        </draw:frame>
        <draw:frame draw:style-name="gr10" draw:text-style-name="P5" draw:layer="layout" svg:width="6cm" svg:height="0.972cm" svg:x="1.35cm" svg:y="2.378cm">
          <draw:text-box>
            <text:p text:style-name="P3"><text:span text:style-name="T5">Escritura en /data y /storage</text:span></text:p>
          </draw:text-box>
        </draw:frame>
        <draw:frame draw:style-name="gr4" draw:text-style-name="P11" draw:layer="layout" svg:width="6.5cm" svg:height="1.199cm" svg:x="1.35cm" svg:y="13.179cm">
          <draw:text-box>
            <text:p text:style-name="P10"><text:span text:style-name="T5">Acceso al hardware</text:span><text:span text:style-name="T5"><text:line-break/></text:span><text:span text:style-name="T5">Lectura y escritura de registr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9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31T10:55:59.103424311</meta:creation-date>
    <dc:date>2026-06-27T12:02:04.142960438</dc:date>
    <meta:editing-duration>PT39M28S</meta:editing-duration>
    <meta:editing-cycles>8</meta:editing-cycles>
    <meta:generator>LibreOffice/7.3.7.2$Linux_X86_64 LibreOffice_project/30$Build-2</meta:generator>
    <meta:document-statistic meta:object-count="19"/>
  </office:meta>
</office:document-meta>
</file>