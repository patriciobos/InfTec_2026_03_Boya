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175cm" fo:min-width="0cm"/>
    </style:style>
    <style:style style:name="gr2" style:family="graphic" style:parent-style-name="standard" style:list-style-name="L1">
      <style:graphic-properties svg:stroke-width="0.1cm" svg:stroke-color="#ec9ba4" draw:marker-start-width="0.15cm" draw:marker-end-width="0.15cm" draw:fill="solid" draw:fill-color="#f7d1d5" draw:textarea-horizontal-align="justify" draw:textarea-vertical-align="middle" draw:auto-grow-height="false" fo:min-height="2.414cm" fo:min-width="4.322cm" fo:padding-top="0.175cm" fo:padding-bottom="0.175cm" fo:padding-left="0.3cm" fo:padding-right="0.3cm"/>
      <style:paragraph-properties style:writing-mode="lr-tb"/>
    </style:style>
    <style:style style:name="gr3" style:family="graphic" style:parent-style-name="standard" style:list-style-name="L1">
      <style:graphic-properties svg:stroke-width="0.1cm" svg:stroke-color="#ec9ba4" draw:marker-start-width="0.15cm" draw:marker-end-width="0.15cm" draw:fill="solid" draw:fill-color="#f7d1d5" draw:textarea-horizontal-align="justify" draw:textarea-vertical-align="middle" draw:auto-grow-height="false" fo:min-height="2.414cm" fo:min-width="4.339cm" fo:padding-top="0.175cm" fo:padding-bottom="0.175cm" fo:padding-left="0.3cm" fo:padding-right="0.3cm"/>
      <style:paragraph-properties style:writing-mode="lr-tb"/>
    </style:style>
    <style:style style:name="gr4" style:family="graphic" style:parent-style-name="standard" style:list-style-name="L1">
      <style:graphic-properties svg:stroke-width="0.1cm" svg:stroke-color="#ec9ba4" draw:marker-start-width="0.15cm" draw:marker-end-width="0.15cm" draw:fill="solid" draw:fill-color="#f7d1d5" draw:textarea-horizontal-align="justify" draw:textarea-vertical-align="middle" draw:auto-grow-height="false" fo:min-height="2.414cm" fo:min-width="4.339cm" fo:padding-top="0.175cm" fo:padding-bottom="0.175cm" fo:padding-left="0.3cm" fo:padding-right="0.3cm"/>
      <style:paragraph-properties style:writing-mode="lr-tb"/>
    </style:style>
    <style:style style:name="gr5" style:family="graphic" style:parent-style-name="standard" style:list-style-name="L1">
      <style:graphic-properties svg:stroke-width="0.1cm" svg:stroke-color="#ffe994" draw:marker-start-width="0.15cm" draw:marker-end-width="0.15cm" draw:fill="solid" draw:fill-color="#ffffd7" draw:textarea-horizontal-align="justify" draw:textarea-vertical-align="middle" draw:auto-grow-height="false" fo:min-height="2.589cm" fo:min-width="3.938cm" fo:padding-top="0cm" fo:padding-bottom="0.175cm" fo:padding-left="0cm" fo:padding-right="0cm"/>
      <style:paragraph-properties style:writing-mode="lr-tb"/>
    </style:style>
    <style:style style:name="gr6" style:family="graphic" style:parent-style-name="standard" style:list-style-name="L1">
      <style:graphic-properties svg:stroke-width="0.1cm" draw:marker-start-width="0.15cm" draw:marker-end-width="0.15cm" draw:fill="solid" draw:fill-color="#b4c7dc" draw:textarea-horizontal-align="justify" draw:textarea-vertical-align="middle" draw:auto-grow-height="false" fo:min-height="2.589cm" fo:min-width="3.938cm" fo:padding-top="0cm" fo:padding-bottom="0.175cm" fo:padding-left="0cm" fo:padding-right="0cm"/>
      <style:paragraph-properties style:writing-mode="lr-tb"/>
    </style:style>
    <style:style style:name="gr7" style:family="graphic" style:parent-style-name="standard" style:list-style-name="L1">
      <style:graphic-properties svg:stroke-width="0.1cm" svg:stroke-color="#77bc65" draw:marker-start-width="0.35cm" draw:marker-end-width="0.35cm" draw:fill="solid" draw:fill-color="#afd095" draw:textarea-horizontal-align="justify" draw:textarea-vertical-align="middle" draw:auto-grow-height="false" fo:min-height="2.589cm" fo:min-width="3.937cm" fo:padding-top="0cm" fo:padding-bottom="0.175cm" fo:padding-left="0cm" fo:padding-right="0cm"/>
      <style:paragraph-properties style:writing-mode="lr-tb"/>
    </style:style>
    <style:style style:name="gr8" style:family="graphic" style:parent-style-name="standard">
      <style:graphic-properties svg:stroke-width="0.1cm" svg:stroke-color="#77bc65" draw:marker-start-width="0.35cm" draw:marker-end-width="0.35cm" draw:fill="solid" draw:fill-color="#afd095" draw:textarea-horizontal-align="justify" draw:textarea-vertical-align="middle" draw:auto-grow-height="false" fo:min-height="2.589cm" fo:min-width="3.937cm" fo:padding-top="0cm" fo:padding-bottom="0.175cm" fo:padding-left="0cm" fo:padding-right="0cm"/>
      <style:paragraph-properties style:writing-mode="lr-tb"/>
    </style:style>
    <style:style style:name="gr9" style:family="graphic" style:parent-style-name="standard" style:list-style-name="L1">
      <style:graphic-properties svg:stroke-width="0.1cm" svg:stroke-color="#77bc65" draw:marker-start-width="0.35cm" draw:marker-end-width="0.35cm" draw:fill="solid" draw:fill-color="#afd095" draw:textarea-horizontal-align="justify" draw:textarea-vertical-align="middle" draw:auto-grow-height="false" fo:min-height="2.589cm" fo:min-width="3.937cm" fo:padding-top="0cm" fo:padding-bottom="0.175cm" fo:padding-left="0cm" fo:padding-right="0cm"/>
      <style:paragraph-properties style:writing-mode="lr-tb"/>
    </style:style>
    <style:style style:name="gr10" style:family="graphic" style:parent-style-name="standard" style:list-style-name="L1">
      <style:graphic-properties svg:stroke-width="0.1cm" draw:marker-start-width="0.15cm" draw:marker-end-width="0.15cm" draw:fill="solid" draw:fill-color="#b4c7dc" draw:textarea-horizontal-align="justify" draw:textarea-vertical-align="middle" draw:auto-grow-height="false" fo:min-height="2.589cm" fo:min-width="3.938cm" fo:padding-top="0cm" fo:padding-bottom="0.175cm" fo:padding-left="0cm" fo:padding-right="0cm"/>
      <style:paragraph-properties style:writing-mode="lr-tb"/>
    </style:style>
    <style:style style:name="gr11" style:family="graphic" style:parent-style-name="standard">
      <style:graphic-properties svg:stroke-width="0.1cm" svg:stroke-color="#ec9ba4" draw:marker-start-width="0.15cm" draw:marker-end-width="0.15cm" draw:fill-color="#f7d1d5" draw:textarea-vertical-align="middle" draw:auto-grow-height="false" fo:min-height="2.4cm" fo:min-width="4.4cm" fo:padding-top="0.175cm" fo:padding-bottom="0.175cm" fo:padding-left="0.3cm" fo:padding-right="0.3cm"/>
      <style:paragraph-properties style:writing-mode="lr-tb"/>
    </style:style>
    <style:style style:name="gr12" style:family="graphic" style:parent-style-name="standard">
      <style:graphic-properties svg:stroke-width="0.1cm" svg:stroke-color="#ffe994" draw:marker-start-width="0.15cm" draw:marker-end-width="0.15cm" draw:fill-color="#ffffd7" draw:textarea-horizontal-align="justify" draw:textarea-vertical-align="middle" draw:auto-grow-height="false" fo:min-height="2.589cm" fo:min-width="3.938cm" fo:padding-top="0cm" fo:padding-bottom="0.175cm" fo:padding-left="0cm" fo:padding-right="0cm"/>
      <style:paragraph-properties style:writing-mode="lr-tb"/>
    </style:style>
    <style:style style:name="gr13" style:family="graphic" style:parent-style-name="standard">
      <style:graphic-properties svg:stroke-width="0.1cm" draw:marker-start-width="0.15cm" draw:marker-end-width="0.15cm" draw:textarea-vertical-align="middle" fo:padding-top="0.175cm" fo:padding-bottom="0.175cm" fo:padding-left="0.3cm" fo:padding-right="0.3cm"/>
      <style:paragraph-properties style:writing-mode="lr-tb"/>
    </style:style>
    <style:style style:name="gr14" style:family="graphic" style:parent-style-name="standard">
      <style:graphic-properties svg:stroke-width="0.1cm" svg:stroke-color="#77bc65" draw:marker-start-width="0.35cm" draw:marker-end-width="0.35cm" draw:fill-color="#afd095" draw:textarea-vertical-align="middle" draw:auto-grow-height="false" fo:min-height="2.575cm" fo:min-width="4cm" fo:padding-top="0cm" fo:padding-bottom="0.175cm" fo:padding-left="0cm" fo:padding-right="0cm"/>
      <style:paragraph-properties style:writing-mode="lr-tb"/>
    </style:style>
    <style:style style:name="gr15" style:family="graphic" style:parent-style-name="standard">
      <style:graphic-properties draw:stroke="none" svg:stroke-color="#000000" draw:fill="none" draw:fill-color="#ffffff" fo:min-height="1.007cm"/>
      <style:paragraph-properties style:writing-mode="lr-tb"/>
    </style:style>
    <style:style style:name="gr16" style:family="graphic" style:parent-style-name="standard">
      <style:graphic-properties draw:stroke="none" svg:stroke-color="#000000" draw:fill="none" draw:fill-color="#ffffff" fo:min-height="0.717cm"/>
      <style:paragraph-properties style:writing-mode="lr-tb"/>
    </style:style>
    <style:style style:name="gr17" style:family="graphic" style:parent-style-name="standard">
      <style:graphic-properties draw:stroke="none" svg:stroke-color="#000000" draw:fill="none" draw:fill-color="#ffffff" fo:min-height="1cm"/>
      <style:paragraph-properties style:writing-mode="lr-tb"/>
    </style:style>
    <style:style style:name="gr18" style:family="graphic" style:parent-style-name="standard" style:list-style-name="L1">
      <style:graphic-properties svg:stroke-width="0.1cm" svg:stroke-color="#ec9ba4" draw:marker-start-width="0.15cm" draw:marker-end-width="0.15cm" draw:fill="solid" draw:fill-color="#f7d1d5" draw:textarea-horizontal-align="justify" draw:textarea-vertical-align="middle" draw:auto-grow-height="false" fo:min-height="2.404cm" fo:min-width="4.322cm" fo:padding-top="0.175cm" fo:padding-bottom="0.175cm" fo:padding-left="0.3cm" fo:padding-right="0.3cm"/>
      <style:paragraph-properties style:writing-mode="lr-tb"/>
    </style:style>
    <style:style style:name="gr19" style:family="graphic" style:parent-style-name="standard" style:list-style-name="L1">
      <style:graphic-properties svg:stroke-width="0.1cm" svg:stroke-color="#ec9ba4" draw:marker-start-width="0.15cm" draw:marker-end-width="0.15cm" draw:fill="solid" draw:fill-color="#f7d1d5" draw:textarea-horizontal-align="justify" draw:textarea-vertical-align="middle" draw:auto-grow-height="false" fo:min-height="2.414cm" fo:min-width="4.34cm" fo:padding-top="0.175cm" fo:padding-bottom="0.175cm" fo:padding-left="0.3cm" fo:padding-right="0.3cm"/>
      <style:paragraph-properties style:writing-mode="lr-tb"/>
    </style:style>
    <style:style style:name="gr20" style:family="graphic" style:parent-style-name="standard">
      <style:graphic-properties svg:stroke-width="0.1cm" draw:marker-start-width="0.15cm" draw:marker-end-width="0.15cm" draw:fill="solid" draw:fill-color="#b4c7dc" draw:textarea-horizontal-align="justify" draw:textarea-vertical-align="middle" draw:auto-grow-height="false" fo:min-height="2.589cm" fo:min-width="3.937cm" fo:padding-top="0cm" fo:padding-bottom="0.175cm" fo:padding-left="0cm" fo:padding-right="0cm"/>
      <style:paragraph-properties style:writing-mode="lr-tb"/>
    </style:style>
    <style:style style:name="gr21" style:family="graphic" style:parent-style-name="standard">
      <style:graphic-properties svg:stroke-width="0.1cm" draw:marker-start-width="0.35cm" draw:marker-end-width="0.35cm" draw:textarea-vertical-align="middle" fo:padding-top="0.175cm" fo:padding-bottom="0.175cm" fo:padding-left="0.3cm" fo:padding-right="0.3cm"/>
      <style:paragraph-properties style:writing-mode="lr-tb"/>
    </style:style>
    <style:style style:name="gr22" style:family="graphic" style:parent-style-name="standard" style:list-style-name="L1">
      <style:graphic-properties svg:stroke-width="0.1cm" draw:marker-start-width="0.15cm" draw:marker-end-width="0.15cm" draw:fill="solid" draw:fill-color="#b4c7dc" draw:textarea-horizontal-align="justify" draw:textarea-vertical-align="middle" draw:auto-grow-height="false" fo:min-height="2.589cm" fo:min-width="3.938cm" fo:padding-top="0cm" fo:padding-bottom="0.175cm" fo:padding-left="0cm" fo:padding-right="0cm"/>
      <style:paragraph-properties style:writing-mode="lr-tb"/>
    </style:style>
    <style:style style:name="gr23" style:family="graphic" style:parent-style-name="standard" style:list-style-name="L1">
      <style:graphic-properties svg:stroke-width="0.1cm" draw:marker-start-width="0.15cm" draw:marker-end-width="0.15cm" draw:fill="solid" draw:fill-color="#b4c7dc" draw:textarea-horizontal-align="justify" draw:textarea-vertical-align="middle" draw:auto-grow-height="false" fo:min-height="2.589cm" fo:min-width="3.937cm" fo:padding-top="0cm" fo:padding-bottom="0.175cm" fo:padding-left="0cm" fo:padding-right="0cm"/>
      <style:paragraph-properties style:writing-mode="lr-tb"/>
    </style:style>
    <style:style style:name="gr24" style:family="graphic" style:parent-style-name="standard">
      <style:graphic-properties svg:stroke-width="0.1cm" svg:stroke-color="#808080" draw:marker-start-width="0.15cm" draw:marker-end-width="0.15cm" draw:fill="solid" draw:fill-color="#cccccc" draw:textarea-horizontal-align="justify" draw:textarea-vertical-align="middle" draw:auto-grow-height="false" fo:min-height="3.671cm" fo:min-width="4.322cm" fo:padding-top="0.175cm" fo:padding-bottom="0.175cm" fo:padding-left="0.3cm" fo:padding-right="0.3cm"/>
    </style:style>
    <style:style style:name="gr25" style:family="graphic" style:parent-style-name="standard">
      <style:graphic-properties draw:stroke="none" svg:stroke-width="0.1cm" svg:stroke-color="#808080" draw:marker-start-width="0.15cm" draw:marker-end-width="0.15cm" draw:fill="solid" draw:fill-color="#000000" draw:textarea-horizontal-align="justify" draw:textarea-vertical-align="middle" draw:auto-grow-height="false" fo:min-height="3.671cm" fo:min-width="4.322cm" fo:padding-top="0.175cm" fo:padding-bottom="0.175cm" fo:padding-left="0.3cm" fo:padding-right="0.3cm" draw:shadow="hidden"/>
      <style:paragraph-properties style:writing-mode="lr-tb"/>
    </style:style>
    <style:style style:name="gr26" style:family="graphic" style:parent-style-name="standard">
      <style:graphic-properties draw:stroke="dash" draw:stroke-dash="Long_20_Dash" svg:stroke-color="#666666" draw:fill="solid" draw:fill-color="#eeeeee" draw:textarea-horizontal-align="justify" draw:textarea-vertical-align="middle" draw:auto-grow-height="false" fo:min-height="4cm" fo:min-width="6.65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8" style:family="graphic" style:parent-style-name="standard">
      <style:graphic-properties svg:stroke-width="0.1cm" draw:marker-start-width="0.15cm" draw:marker-end-width="0.15cm" draw:fill-color="#b4c7dc" draw:textarea-horizontal-align="justify" draw:textarea-vertical-align="middle" draw:auto-grow-height="false" fo:min-height="0.179cm" fo:min-width="0.354cm" fo:padding-top="0cm" fo:padding-bottom="0.175cm" fo:padding-left="0cm" fo:padding-right="0cm"/>
    </style:style>
    <style:style style:name="gr29" style:family="graphic" style:parent-style-name="standard">
      <style:graphic-properties svg:stroke-width="0.1cm" svg:stroke-color="#ffe994" draw:marker-start-width="0.15cm" draw:marker-end-width="0.15cm" draw:fill-color="#ffffd7" draw:textarea-horizontal-align="justify" draw:textarea-vertical-align="middle" draw:auto-grow-height="false" fo:min-height="0.179cm" fo:min-width="0.354cm" fo:padding-top="0cm" fo:padding-bottom="0.175cm" fo:padding-left="0cm" fo:padding-right="0cm"/>
    </style:style>
    <style:style style:name="gr30" style:family="graphic" style:parent-style-name="standard">
      <style:graphic-properties svg:stroke-width="0.1cm" svg:stroke-color="#ec9ba4" draw:marker-start-width="0.15cm" draw:marker-end-width="0.15cm" draw:fill-color="#f7d1d5" draw:textarea-horizontal-align="justify" draw:textarea-vertical-align="middle" draw:auto-grow-height="false" fo:min-height="0.004cm" fo:min-width="0cm" fo:padding-top="0.175cm" fo:padding-bottom="0.175cm" fo:padding-left="0.3cm" fo:padding-right="0.3cm"/>
    </style:style>
    <style:style style:name="gr31" style:family="graphic" style:parent-style-name="standard">
      <style:graphic-properties svg:stroke-width="0.1cm" svg:stroke-color="#77bc65" draw:marker-start-width="0.35cm" draw:marker-end-width="0.35cm" draw:fill-color="#afd095" draw:textarea-horizontal-align="justify" draw:textarea-vertical-align="middle" draw:auto-grow-height="false" fo:min-height="0.179cm" fo:min-width="0.354cm" fo:padding-top="0cm" fo:padding-bottom="0.175cm" fo:padding-left="0cm" fo:padding-right="0cm"/>
    </style:style>
    <style:style style:name="gr32" style:family="graphic" style:parent-style-name="standard">
      <style:graphic-properties svg:stroke-width="0.1cm" svg:stroke-color="#808080" draw:marker-start-width="0.35cm" draw:marker-end-width="0.35cm" draw:fill="solid" draw:fill-color="#b2b2b2" draw:textarea-horizontal-align="justify" draw:textarea-vertical-align="middle" draw:auto-grow-height="false" fo:min-height="0.179cm" fo:min-width="0.354cm" fo:padding-top="0cm" fo:padding-bottom="0.175cm" fo:padding-left="0cm" fo:padding-right="0cm"/>
      <style:paragraph-properties style:writing-mode="lr-tb"/>
    </style:style>
    <style:style style:name="P1" style:family="paragraph">
      <style:paragraph-properties fo:text-align="center"/>
      <style:text-properties style:text-underline-style="solid" style:text-underline-width="auto" style:text-underline-color="font-color"/>
    </style:style>
    <style:style style:name="P2" style:family="paragraph">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3" style:family="paragraph">
      <loext:graphic-properties draw:fill="solid" draw:fill-color="#f7d1d5"/>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4" style:family="paragraph">
      <style:paragraph-properties fo:margin-left="0cm" fo:margin-right="0cm" fo:margin-top="0cm" fo:margin-bottom="0cm" fo:line-height="100%" fo:text-align="center" fo:text-indent="0cm" style:writing-mode="lr-tb"/>
    </style:style>
    <style:style style:name="P5" style:family="paragraph">
      <loext:graphic-properties draw:fill="solid" draw:fill-color="#ffffd7"/>
      <style:paragraph-properties fo:margin-left="0cm" fo:margin-right="0cm" fo:margin-top="0cm" fo:margin-bottom="0cm" fo:line-height="100%" fo:text-align="center" fo:text-indent="0cm" style:writing-mode="lr-tb"/>
      <style:text-properties fo:font-size="18pt" style:font-size-asian="18pt" style:font-size-complex="18pt"/>
    </style:style>
    <style:style style:name="P6" style:family="paragraph">
      <style:paragraph-properties fo:margin-left="0cm" fo:margin-right="0cm" fo:margin-top="0cm" fo:margin-bottom="0cm" fo:line-height="100%"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7" style:family="paragraph">
      <loext:graphic-properties draw:fill="solid" draw:fill-color="#b4c7dc"/>
      <style:paragraph-properties fo:margin-left="0cm" fo:margin-right="0cm" fo:margin-top="0cm" fo:margin-bottom="0cm" fo:line-height="100%"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8" style:family="paragraph">
      <loext:graphic-properties draw:fill="solid" draw:fill-color="#afd095"/>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9" style:family="paragraph">
      <style:paragraph-properties fo:text-align="center" style:writing-mode="lr-tb"/>
    </style:style>
    <style:style style:name="P10" style:family="paragraph">
      <loext:graphic-properties draw:fill="solid" draw:fill-color="#afd095"/>
      <style:paragraph-properties fo:text-align="center" style:writing-mode="lr-tb"/>
      <style:text-properties fo:font-size="18pt" style:font-size-asian="18pt" style:font-size-complex="18pt"/>
    </style:style>
    <style:style style:name="P11" style:family="paragraph">
      <loext:graphic-properties draw:fill="solid" draw:fill-color="#b4c7dc"/>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12" style:family="paragraph">
      <style:paragraph-properties fo:text-align="center"/>
    </style:style>
    <style:style style:name="P13" style:family="paragraph">
      <loext:graphic-properties draw:fill-color="#f7d1d5"/>
      <style:paragraph-properties fo:text-align="center"/>
      <style:text-properties fo:font-size="18pt" style:font-size-asian="18pt" style:font-size-complex="18pt"/>
    </style:style>
    <style:style style:name="P14" style:family="paragraph">
      <style:paragraph-properties fo:text-align="center"/>
      <style:text-properties fo:font-size="18pt" style:font-size-asian="18pt" style:font-size-complex="18pt"/>
    </style:style>
    <style:style style:name="P15" style:family="paragraph">
      <loext:graphic-properties draw:fill-color="#ffffd7"/>
      <style:paragraph-properties fo:text-align="center"/>
      <style:text-properties fo:font-size="18pt" style:font-size-asian="18pt" style:font-size-complex="18pt"/>
    </style:style>
    <style:style style:name="P16" style:family="paragraph">
      <loext:graphic-properties draw:fill-color="#afd095"/>
      <style:paragraph-properties fo:text-align="center"/>
      <style:text-properties fo:font-size="18pt" style:font-size-asian="18pt" style:font-size-complex="18pt"/>
    </style:style>
    <style:style style:name="P17" style:family="paragraph">
      <loext:graphic-properties draw:fill="none" draw:fill-color="#ffffff"/>
      <style:text-properties fo:font-size="18pt" style:font-size-asian="18pt" style:font-size-complex="18pt"/>
    </style:style>
    <style:style style:name="P18" style:family="paragraph">
      <loext:graphic-properties draw:fill="solid" draw:fill-color="#b4c7dc"/>
      <style:paragraph-properties fo:text-align="center" style:writing-mode="lr-tb"/>
      <style:text-properties fo:font-size="18pt" style:font-size-asian="18pt" style:font-size-complex="18pt"/>
    </style:style>
    <style:style style:name="P19" style:family="paragraph">
      <loext:graphic-properties draw:fill="solid" draw:fill-color="#cccccc"/>
      <style:paragraph-properties fo:text-align="center" style:writing-mode="lr-tb"/>
      <style:text-properties fo:font-size="18pt" style:font-size-asian="18pt" style:font-size-complex="18pt"/>
    </style:style>
    <style:style style:name="P20" style:family="paragraph">
      <loext:graphic-properties draw:fill="solid" draw:fill-color="#000000"/>
      <style:paragraph-properties fo:text-align="center" style:writing-mode="lr-tb"/>
      <style:text-properties fo:font-size="18pt" style:font-size-asian="18pt" style:font-size-complex="18pt"/>
    </style:style>
    <style:style style:name="P21" style:family="paragraph">
      <loext:graphic-properties draw:fill="solid" draw:fill-color="#eeeeee"/>
      <style:paragraph-properties fo:text-align="center"/>
      <style:text-properties style:text-underline-style="solid" style:text-underline-width="auto" style:text-underline-color="font-color"/>
    </style:style>
    <style:style style:name="P22" style:family="paragraph">
      <style:text-properties style:text-underline-style="solid" style:text-underline-width="auto" style:text-underline-color="font-color"/>
    </style:style>
    <style:style style:name="P23" style:family="paragraph">
      <loext:graphic-properties draw:fill="none" draw:fill-color="#ffffff"/>
      <style:text-properties style:text-underline-style="none"/>
    </style:style>
    <style:style style:name="P24" style:family="paragraph">
      <loext:graphic-properties draw:fill-color="#b4c7dc"/>
      <style:paragraph-properties fo:text-align="center"/>
      <style:text-properties style:text-underline-style="none"/>
    </style:style>
    <style:style style:name="P25" style:family="paragraph">
      <loext:graphic-properties draw:fill-color="#ffffd7"/>
      <style:paragraph-properties fo:text-align="center"/>
      <style:text-properties style:text-underline-style="none"/>
    </style:style>
    <style:style style:name="P26" style:family="paragraph">
      <loext:graphic-properties draw:fill-color="#f7d1d5"/>
      <style:paragraph-properties fo:text-align="center"/>
      <style:text-properties style:text-underline-style="none"/>
    </style:style>
    <style:style style:name="P27" style:family="paragraph">
      <loext:graphic-properties draw:fill-color="#afd095"/>
      <style:paragraph-properties fo:text-align="center"/>
      <style:text-properties style:text-underline-style="none"/>
    </style:style>
    <style:style style:name="P28" style:family="paragraph">
      <style:paragraph-properties fo:text-align="center"/>
      <style:text-properties style:text-underline-style="none"/>
    </style:style>
    <style:style style:name="P29" style:family="paragraph">
      <loext:graphic-properties draw:fill="solid" draw:fill-color="#b2b2b2"/>
      <style:paragraph-properties fo:text-align="center"/>
      <style:text-properties style:text-underline-style="none"/>
    </style:style>
    <style:style style:name="T1" style:family="text">
      <style:text-properties fo:font-size="16pt"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fo:font-size="18pt" style:font-size-asian="18pt" style:font-size-complex="18pt"/>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 style:family="text">
      <style:text-properties fo:font-size="14pt" style:text-underline-style="none"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0.5cm" svg:height="0.425cm" svg:x="8.665cm" svg:y="4.935cm">
          <text:p/>
          <draw:enhanced-geometry svg:viewBox="0 0 21600 21600" draw:type="rectangle" draw:enhanced-path="M 0 0 L 21600 0 21600 21600 0 21600 0 0 Z N"/>
        </draw:custom-shape>
        <draw:custom-shape draw:style-name="gr2" draw:text-style-name="P3" xml:id="id2" draw:id="id2" draw:layer="layout" svg:width="4.922cm" svg:height="2.764cm" svg:x="18.146cm" svg:y="5.606cm">
          <text:p text:style-name="P2"><text:span text:style-name="T1">Interfaz de audio</text:span><text:span text:style-name="T1"><text:line-break/></text:span><text:span text:style-name="T1">Behringer</text:span><text:span text:style-name="T1"><text:line-break/></text:span><text:span text:style-name="T2">UMC204HD</text:span></text:p>
          <draw:enhanced-geometry svg:viewBox="0 0 21600 21600" draw:mirror-horizontal="false" draw:mirror-vertical="false" draw:type="rectangle" draw:enhanced-path="M 0 0 L 21600 0 21600 21600 0 21600 0 0 Z N"/>
        </draw:custom-shape>
        <draw:custom-shape draw:style-name="gr3" draw:text-style-name="P3" xml:id="id5" draw:id="id5" draw:layer="layout" svg:width="4.939cm" svg:height="2.764cm" svg:x="12.813cm" svg:y="10.316cm">
          <text:p text:style-name="P2"><text:span text:style-name="T1">Preamplificador</text:span><text:span text:style-name="T1"><text:line-break/></text:span><text:span text:style-name="T1">DAS-1</text:span></text:p>
          <draw:enhanced-geometry svg:viewBox="0 0 21600 21600" draw:type="rectangle" draw:enhanced-path="M 0 0 L 21600 0 21600 21600 0 21600 0 0 Z N"/>
        </draw:custom-shape>
        <draw:custom-shape draw:style-name="gr4" draw:text-style-name="P3" xml:id="id6" draw:id="id6" draw:layer="layout" svg:width="4.939cm" svg:height="2.764cm" svg:x="12.813cm" svg:y="14.336cm">
          <text:p text:style-name="P2"><text:span text:style-name="T3">Hidrófono</text:span><text:span text:style-name="T3"><text:line-break/></text:span><text:span text:style-name="T3">B&amp;K 8105</text:span></text:p>
          <draw:enhanced-geometry svg:viewBox="0 0 21600 21600" draw:type="rectangle" draw:enhanced-path="M 0 0 L 21600 0 21600 21600 0 21600 0 0 Z N"/>
        </draw:custom-shape>
        <draw:custom-shape draw:style-name="gr5" draw:text-style-name="P5" xml:id="id3" draw:id="id3" draw:layer="layout" svg:width="3.938cm" svg:height="2.764cm" svg:x="9.895cm" svg:y="0.1cm">
          <text:p text:style-name="P4"><text:span text:style-name="T4">SDB modem</text:span><text:span text:style-name="T4"><text:line-break/></text:span><text:span text:style-name="T3">Iridium Edge</text:span></text:p>
          <draw:enhanced-geometry svg:viewBox="0 0 21600 21600" draw:type="rectangle" draw:enhanced-path="M 0 0 L 21600 0 21600 21600 0 21600 0 0 Z N"/>
        </draw:custom-shape>
        <draw:custom-shape draw:style-name="gr6" draw:text-style-name="P7" xml:id="id7" draw:id="id7" draw:layer="layout" svg:width="3.938cm" svg:height="2.764cm" svg:x="4.618cm" svg:y="0.1cm">
          <text:p text:style-name="P6"><text:span text:style-name="T3">Anemómetro</text:span><text:span text:style-name="T3"><text:line-break/></text:span><text:span text:style-name="T3">GILL</text:span><text:span text:style-name="T3"><text:line-break/></text:span><text:span text:style-name="T3">WindSonic</text:span></text:p>
          <draw:enhanced-geometry svg:viewBox="0 0 21600 21600" draw:type="rectangle" draw:enhanced-path="M 0 0 L 21600 0 21600 21600 0 21600 0 0 Z N"/>
        </draw:custom-shape>
        <draw:custom-shape draw:style-name="gr7" draw:text-style-name="P8" xml:id="id10" draw:id="id10" draw:layer="layout" svg:width="3.937cm" svg:height="2.764cm" svg:x="0.099cm" svg:y="10.316cm">
          <text:p text:style-name="P2"><text:span text:style-name="T3">Regulador</text:span><text:span text:style-name="T3"><text:line-break/></text:span><text:span text:style-name="T3">EPEVER</text:span><text:span text:style-name="T3"><text:line-break/></text:span><text:span text:style-name="T3">XTRA2210</text:span></text:p>
          <draw:enhanced-geometry svg:viewBox="0 0 21600 21600" draw:type="rectangle" draw:enhanced-path="M 0 0 L 21600 0 21600 21600 0 21600 0 0 Z N"/>
        </draw:custom-shape>
        <draw:custom-shape draw:style-name="gr8" draw:text-style-name="P10" xml:id="id9" draw:id="id9" draw:layer="layout" svg:width="3.937cm" svg:height="2.764cm" svg:x="0.099cm" svg:y="6.181cm">
          <text:p text:style-name="P9"><text:span text:style-name="T3">Panel Solar</text:span></text:p>
          <draw:enhanced-geometry svg:viewBox="0 0 21600 21600" draw:type="rectangle" draw:enhanced-path="M 0 0 L 21600 0 21600 21600 0 21600 0 0 Z N"/>
        </draw:custom-shape>
        <draw:custom-shape draw:style-name="gr9" draw:text-style-name="P8" xml:id="id11" draw:id="id11" draw:layer="layout" svg:width="3.937cm" svg:height="2.764cm" svg:x="0.099cm" svg:y="14.336cm">
          <text:p text:style-name="P2"><text:span text:style-name="T3">Batería</text:span><text:span text:style-name="T3"><text:line-break/></text:span><text:span text:style-name="T3">TRV</text:span><text:span text:style-name="T3"><text:line-break/></text:span><text:span text:style-name="T3">12V / 110Ah</text:span></text:p>
          <draw:enhanced-geometry svg:viewBox="0 0 21600 21600" draw:type="rectangle" draw:enhanced-path="M 0 0 L 21600 0 21600 21600 0 21600 0 0 Z N"/>
        </draw:custom-shape>
        <draw:custom-shape draw:style-name="gr10" draw:text-style-name="P11" xml:id="id8" draw:id="id8" draw:layer="layout" svg:width="3.938cm" svg:height="2.764cm" svg:x="0.09cm" svg:y="0.1cm">
          <text:p text:style-name="P2"><text:span text:style-name="T3">AIS + GPS</text:span><text:span text:style-name="T3"><text:line-break/></text:span><text:span text:style-name="T3">AMEC</text:span><text:span text:style-name="T3"><text:line-break/></text:span><text:span text:style-name="T3">Mando-301</text:span></text:p>
          <draw:enhanced-geometry svg:viewBox="0 0 21600 21600" draw:type="rectangle" draw:enhanced-path="M 0 0 L 21600 0 21600 21600 0 21600 0 0 Z N"/>
        </draw:custom-shape>
        <draw:connector draw:style-name="gr11" draw:text-style-name="P13" draw:layer="layout" svg:x1="11.3cm" svg:y1="6.989cm" svg:x2="18.146cm" svg:y2="6.988cm" draw:start-shape="id1" draw:start-glue-point="1" draw:end-shape="id2" draw:end-glue-point="3" svg:d="M11300 6989h3423v-1h3423" svg:viewBox="0 0 6847 2">
          <text:p text:style-name="P12"><text:span text:style-name="T3"/></text:p>
        </draw:connector>
        <draw:connector draw:style-name="gr12" draw:text-style-name="P15" draw:layer="layout" svg:x1="11.864cm" svg:y1="2.864cm" svg:x2="8.915cm" svg:y2="4.935cm" draw:start-shape="id3" draw:start-glue-point="2" draw:end-shape="id4" draw:end-glue-point="0" svg:d="M11864 2864v1060h-2949v1011" svg:viewBox="0 0 2950 2072">
          <text:p text:style-name="P14"><text:span text:style-name="T3"/></text:p>
        </draw:connector>
        <draw:connector draw:style-name="gr11" draw:text-style-name="P13" draw:layer="layout" draw:line-skew="0.407cm" svg:x1="20.607cm" svg:y1="8.37cm" svg:x2="15.282cm" svg:y2="10.316cm" draw:start-shape="id2" draw:start-glue-point="2" draw:end-shape="id5" draw:end-glue-point="0" svg:d="M20607 8370v1380h-5325v566" svg:viewBox="0 0 5326 1947">
          <text:p text:style-name="P12"><text:span text:style-name="T3"/></text:p>
        </draw:connector>
        <draw:connector draw:style-name="gr11" draw:text-style-name="P13" draw:layer="layout" svg:x1="15.282cm" svg:y1="13.08cm" svg:x2="15.282cm" svg:y2="14.336cm" draw:start-shape="id5" draw:start-glue-point="2" draw:end-shape="id6" draw:end-glue-point="0" svg:d="M15282 13080v1256" svg:viewBox="0 0 1 1257">
          <text:p text:style-name="P12"><text:span text:style-name="T3"/></text:p>
        </draw:connector>
        <draw:connector draw:style-name="gr13" draw:text-style-name="P14" draw:layer="layout" svg:x1="8.839cm" svg:y1="4.979cm" svg:x2="6.587cm" svg:y2="2.864cm" draw:start-shape="id1" draw:end-shape="id7" draw:end-glue-point="2" svg:d="M8839 4979v-1057h-2252v-1058" svg:viewBox="0 0 2253 2116">
          <text:p text:style-name="P12"><text:span text:style-name="T3"/></text:p>
        </draw:connector>
        <draw:connector draw:style-name="gr13" draw:text-style-name="P14" draw:layer="layout" svg:x1="8.839cm" svg:y1="4.979cm" svg:x2="2.059cm" svg:y2="2.864cm" draw:start-shape="id1" draw:start-glue-point="0" draw:end-shape="id8" draw:end-glue-point="2" svg:d="M8839 4979v-1057h-6780v-1058" svg:viewBox="0 0 6781 2116">
          <text:p text:style-name="P12"><text:span text:style-name="T3"/></text:p>
        </draw:connector>
        <draw:connector draw:style-name="gr14" draw:text-style-name="P16" draw:layer="layout" svg:x1="2.067cm" svg:y1="8.945cm" svg:x2="2.067cm" svg:y2="10.316cm" draw:start-shape="id9" draw:start-glue-point="2" draw:end-shape="id10" draw:end-glue-point="0" svg:d="M2067 8945v1371" svg:viewBox="0 0 1 1372">
          <text:p text:style-name="P12"><text:span text:style-name="T3"/></text:p>
        </draw:connector>
        <draw:connector draw:style-name="gr14" draw:text-style-name="P16" draw:layer="layout" svg:x1="2.067cm" svg:y1="13.08cm" svg:x2="2.067cm" svg:y2="14.336cm" draw:start-shape="id10" draw:start-glue-point="2" draw:end-shape="id11" draw:end-glue-point="0" svg:d="M2067 13080v1256" svg:viewBox="0 0 1 1257">
          <text:p text:style-name="P12"><text:span text:style-name="T3"/></text:p>
        </draw:connector>
        <draw:connector draw:style-name="gr14" draw:text-style-name="P16" draw:layer="layout" svg:x1="4.036cm" svg:y1="11.698cm" svg:x2="6.411cm" svg:y2="6.934cm" draw:start-shape="id10" draw:start-glue-point="1" svg:d="M4036 11698h1462v-4764h913" svg:viewBox="0 0 2376 4765">
          <text:p text:style-name="P12"><text:span text:style-name="T3"/></text:p>
        </draw:connector>
        <draw:frame draw:style-name="gr15" draw:text-style-name="P17" draw:layer="layout" svg:width="2.461cm" svg:height="1.257cm" svg:x="7.818cm" svg:y="3.019cm">
          <draw:text-box>
            <text:p><text:span text:style-name="T3">RS232</text:span></text:p>
          </draw:text-box>
        </draw:frame>
        <draw:frame draw:style-name="gr16" draw:text-style-name="P17" draw:layer="layout" svg:width="2.461cm" svg:height="0.967cm" svg:x="11.484cm" svg:y="5.955cm">
          <draw:text-box>
            <text:p><text:span text:style-name="T3">USB</text:span></text:p>
          </draw:text-box>
        </draw:frame>
        <draw:frame draw:style-name="gr17" draw:text-style-name="P17" draw:layer="layout" svg:width="2.561cm" svg:height="1.25cm" svg:x="4.05cm" svg:y="5.75cm">
          <draw:text-box>
            <text:p><text:span text:style-name="T3">RS485</text:span></text:p>
          </draw:text-box>
        </draw:frame>
        <draw:custom-shape draw:style-name="gr18" draw:text-style-name="P3" xml:id="id12" draw:id="id12" draw:layer="layout" svg:width="4.922cm" svg:height="2.754cm" svg:x="18.146cm" svg:y="10.326cm">
          <text:p text:style-name="P2"><text:span text:style-name="T1">Preamplificador</text:span><text:span text:style-name="T1"><text:line-break/></text:span><text:span text:style-name="T1">DAS-2</text:span></text:p>
          <draw:enhanced-geometry svg:viewBox="0 0 21600 21600" draw:mirror-horizontal="false" draw:mirror-vertical="false" draw:type="rectangle" draw:enhanced-path="M 0 0 L 21600 0 21600 21600 0 21600 0 0 Z N"/>
        </draw:custom-shape>
        <draw:custom-shape draw:style-name="gr19" draw:text-style-name="P3" xml:id="id13" draw:id="id13" draw:layer="layout" svg:width="4.94cm" svg:height="2.764cm" svg:x="18.128cm" svg:y="14.336cm">
          <text:p text:style-name="P2"><text:span text:style-name="T3">Hidrófono</text:span><text:span text:style-name="T3"><text:line-break/></text:span><text:span text:style-name="T3">B&amp;K 8105</text:span></text:p>
          <draw:enhanced-geometry svg:viewBox="0 0 21600 21600" draw:type="rectangle" draw:enhanced-path="M 0 0 L 21600 0 21600 21600 0 21600 0 0 Z N"/>
        </draw:custom-shape>
        <draw:connector draw:style-name="gr11" draw:text-style-name="P13" draw:layer="layout" svg:x1="20.607cm" svg:y1="13.08cm" svg:x2="20.598cm" svg:y2="14.336cm" draw:start-shape="id12" draw:start-glue-point="2" draw:end-shape="id13" draw:end-glue-point="0" svg:d="M20607 13080v628h-9v628" svg:viewBox="0 0 10 1257">
          <text:p text:style-name="P12"><text:span text:style-name="T3"/></text:p>
        </draw:connector>
        <draw:connector draw:style-name="gr11" draw:text-style-name="P13" draw:layer="layout" svg:x1="20.607cm" svg:y1="8.37cm" svg:x2="20.607cm" svg:y2="10.326cm" draw:start-shape="id2" draw:start-glue-point="2" draw:end-shape="id12" draw:end-glue-point="0" svg:d="M20607 8370v1956" svg:viewBox="0 0 1 1957">
          <text:p text:style-name="P12"><text:span text:style-name="T3"/></text:p>
        </draw:connector>
        <draw:frame draw:style-name="gr16" draw:text-style-name="P17" draw:layer="layout" svg:width="3.743cm" svg:height="0.967cm" svg:x="17.007cm" svg:y="8.669cm">
          <draw:text-box>
            <text:p><text:span text:style-name="T3">B</text:span><text:span text:style-name="T3">N</text:span><text:span text:style-name="T3">C</text:span><text:span text:style-name="T3"> </text:span><text:span text:style-name="T3">/</text:span><text:span text:style-name="T3"> </text:span><text:span text:style-name="T3">X</text:span><text:span text:style-name="T3">L</text:span><text:span text:style-name="T3">R</text:span></text:p>
          </draw:text-box>
        </draw:frame>
        <draw:frame draw:style-name="gr16" draw:text-style-name="P17" draw:layer="layout" svg:width="2.461cm" svg:height="0.967cm" svg:x="15.224cm" svg:y="13.392cm">
          <draw:text-box>
            <text:p><text:span text:style-name="T3">BNC</text:span></text:p>
          </draw:text-box>
        </draw:frame>
        <draw:frame draw:style-name="gr16" draw:text-style-name="P17" draw:layer="layout" svg:width="2.461cm" svg:height="0.967cm" svg:x="20.638cm" svg:y="13.392cm">
          <draw:text-box>
            <text:p><text:span text:style-name="T3">BNC</text:span></text:p>
          </draw:text-box>
        </draw:frame>
        <draw:custom-shape draw:style-name="gr20" draw:text-style-name="P18" xml:id="id14" draw:id="id14" draw:layer="layout" svg:width="3.937cm" svg:height="2.764cm" svg:x="6.904cm" svg:y="10.316cm">
          <text:p text:style-name="P9"><text:span text:style-name="T3">Puente </text:span><text:span text:style-name="T3">USB/I2C</text:span><text:span text:style-name="T3"><text:line-break/></text:span><text:span text:style-name="T3">CH431A</text:span></text:p>
          <draw:enhanced-geometry svg:viewBox="0 0 21600 21600" draw:type="rectangle" draw:enhanced-path="M 0 0 L 21600 0 21600 21600 0 21600 0 0 Z N"/>
        </draw:custom-shape>
        <draw:connector draw:style-name="gr21" draw:text-style-name="P14" draw:layer="layout" svg:x1="8.872cm" svg:y1="10.316cm" svg:x2="8.872cm" svg:y2="8.945cm" draw:start-shape="id14" draw:start-glue-point="0" svg:d="M8872 10316v-1371" svg:viewBox="0 0 1 1372">
          <text:p text:style-name="P12"><text:span text:style-name="T3"/></text:p>
        </draw:connector>
        <draw:frame draw:style-name="gr16" draw:text-style-name="P17" draw:layer="layout" svg:width="2.46cm" svg:height="0.967cm" svg:x="8.95cm" svg:y="9.07cm">
          <draw:text-box>
            <text:p><text:span text:style-name="T3">U</text:span><text:span text:style-name="T3">S</text:span><text:span text:style-name="T3">B</text:span></text:p>
          </draw:text-box>
        </draw:frame>
        <draw:custom-shape draw:style-name="gr22" draw:text-style-name="P11" xml:id="id15" draw:id="id15" draw:layer="layout" svg:width="3.938cm" svg:height="2.764cm" svg:x="4.347cm" svg:y="14.336cm">
          <text:p text:style-name="P2"><text:span text:style-name="T3">Unidad inercial</text:span><text:span text:style-name="T3"><text:line-break/></text:span><text:span text:style-name="T3">MPU6050</text:span></text:p>
          <draw:enhanced-geometry svg:viewBox="0 0 21600 21600" draw:type="rectangle" draw:enhanced-path="M 0 0 L 21600 0 21600 21600 0 21600 0 0 Z N"/>
        </draw:custom-shape>
        <draw:custom-shape draw:style-name="gr23" draw:text-style-name="P11" xml:id="id16" draw:id="id16" draw:layer="layout" svg:width="3.937cm" svg:height="2.764cm" svg:x="8.58cm" svg:y="14.336cm">
          <text:p text:style-name="P2"><text:span text:style-name="T3">Sensor ambiental</text:span><text:span text:style-name="T3"><text:line-break/></text:span><text:span text:style-name="T3">AHT10</text:span></text:p>
          <draw:enhanced-geometry svg:viewBox="0 0 21600 21600" draw:type="rectangle" draw:enhanced-path="M 0 0 L 21600 0 21600 21600 0 21600 0 0 Z N"/>
        </draw:custom-shape>
        <draw:connector draw:style-name="gr21" draw:text-style-name="P14" draw:layer="layout" svg:x1="6.316cm" svg:y1="14.336cm" svg:x2="8.872cm" svg:y2="13.08cm" draw:start-shape="id15" draw:start-glue-point="0" draw:end-shape="id14" draw:end-glue-point="2" svg:d="M6316 14336v-628h2556v-628" svg:viewBox="0 0 2557 1257">
          <text:p text:style-name="P12"><text:span text:style-name="T3"/></text:p>
        </draw:connector>
        <draw:connector draw:style-name="gr21" draw:text-style-name="P14" draw:layer="layout" svg:x1="10.548cm" svg:y1="14.336cm" svg:x2="8.872cm" svg:y2="13.08cm" draw:start-shape="id16" draw:start-glue-point="0" draw:end-shape="id14" draw:end-glue-point="2" svg:d="M10548 14336v-628h-1676v-628" svg:viewBox="0 0 1677 1257">
          <text:p text:style-name="P12"><text:span text:style-name="T3"/></text:p>
        </draw:connector>
        <draw:frame draw:style-name="gr16" draw:text-style-name="P17" draw:layer="layout" svg:width="1.969cm" svg:height="0.967cm" svg:x="10.598cm" svg:y="13.392cm">
          <draw:text-box>
            <text:p><text:span text:style-name="T3">I2</text:span><text:span text:style-name="T3">C</text:span></text:p>
          </draw:text-box>
        </draw:frame>
        <draw:frame draw:style-name="gr16" draw:text-style-name="P17" draw:layer="layout" svg:width="1.968cm" svg:height="0.967cm" svg:x="4.889cm" svg:y="13.392cm">
          <draw:text-box>
            <text:p><text:span text:style-name="T3">I2</text:span><text:span text:style-name="T3">C</text:span></text:p>
          </draw:text-box>
        </draw:frame>
        <draw:g xml:id="id1" draw:id="id1">
          <draw:glue-point draw:id="4" svg:x="0.361cm" svg:y="-4.807cm" draw:escape-direction="up"/>
          <draw:glue-point draw:id="5" svg:x="0.361cm" svg:y="-4.807cm" draw:escape-direction="up"/>
          <draw:glue-point draw:id="6" svg:x="0.361cm" svg:y="-4.807cm"/>
          <draw:glue-point draw:id="7" svg:x="0.428cm" svg:y="-4.946cm"/>
          <draw:glue-point draw:id="8" svg:x="0.428cm" svg:y="-4.946cm"/>
          <draw:glue-point draw:id="9" svg:x="0.428cm" svg:y="-4.946cm" draw:escape-direction="up"/>
          <draw:glue-point draw:id="10" svg:x="0.428cm" svg:y="-4.946cm" draw:escape-direction="up"/>
          <draw:glue-point draw:id="11" svg:x="1.444cm" svg:y="-4.946cm"/>
          <draw:glue-point draw:id="12" svg:x="-3.634cm" svg:y="-4.946cm"/>
          <draw:polygon draw:style-name="gr24" draw:text-style-name="P19" draw:layer="layout" svg:width="4.921cm" svg:height="4.02cm" svg:x="6.378cm" svg:y="4.979cm" svg:viewBox="0 0 4922 4021" draw:points="0,4021 0,0 4922,0 4922,4021">
            <text:p/>
          </draw:polygon>
          <draw:polygon draw:style-name="gr25" draw:text-style-name="P20" draw:layer="layout" svg:width="0.401cm" svg:height="0.449cm" svg:x="6.954cm" svg:y="5.7cm" svg:viewBox="0 0 402 450" draw:points="213,48 196,49 179,51 171,53 163,55 156,57 149,60 142,63 135,67 129,70 123,75 117,79 111,84 106,89 100,95 96,101 91,107 87,114 83,121 76,135 70,150 66,167 63,185 61,203 60,223 61,243 63,261 66,279 71,296 77,311 84,326 88,333 92,340 97,346 102,352 108,358 113,364 119,369 125,374 131,378 138,382 145,386 152,389 159,392 166,394 174,397 182,398 198,401 216,401 227,401 238,400 249,398 259,396 269,392 278,388 287,384 296,379 305,373 313,366 320,358 328,350 335,341 342,332 348,321 354,310 402,335 395,348 387,361 379,373 370,384 360,395 349,404 338,413 326,421 314,427 301,433 288,438 274,443 259,446 244,448 229,450 213,450 197,450 181,448 166,446 151,443 137,439 124,435 111,429 99,423 87,415 76,407 66,399 56,389 47,379 39,368 32,356 25,344 19,331 14,317 10,303 6,288 4,273 2,257 0,240 0,223 1,198 4,174 8,151 14,130 18,120 22,110 27,101 32,92 37,83 43,75 50,67 56,59 64,52 71,45 79,39 87,33 96,28 105,23 114,19 124,15 134,11 144,8 165,4 188,1 213,0 230,0 246,2 262,4 277,7 291,11 304,15 317,21 329,27 341,35 351,43 361,52 370,61 378,72 386,83 392,95 398,108 342,127 338,118 333,109 328,101 322,93 316,86 309,80 301,74 293,69 285,64 276,60 266,56 256,53 246,51 236,50 225,49">
            <text:p/>
          </draw:polygon>
          <draw:path draw:style-name="gr25" draw:text-style-name="P20" draw:layer="layout" svg:width="0.299cm" svg:height="0.347cm" svg:x="7.405cm" svg:y="5.801cm" svg:viewBox="0 0 300 348" svg:d="M300 174l-1 21-2 20-3 19-4 17-5 15-4 8-3 7-4 6-4 7-4 6-5 5-5 5-5 5-6 5-5 4-7 4-6 3-7 4-6 2-8 3-7 2-16 4-17 2h-17-18l-17-3-8-1-8-2-7-2-7-3-7-3-6-3-7-4-5-4-6-4-6-5-5-5-4-6-5-5-4-6-4-7-4-6-3-7-3-8-6-15-4-17-3-18-1-20-1-20 1-21 1-20 3-18 4-17 6-16 6-14 8-13 9-12 10-10 11-9 12-7 14-6 14-5 16-3 17-2 18-1 19 1 17 2 16 3 8 2 7 3 7 2 7 4 6 3 6 4 6 4 5 4 5 5 5 5 4 6 4 6 4 6 3 6 4 7 3 8 5 15 4 18 3 18 1 20zM241 174v-17l-1-16-2-14-2-13-3-12-3-11-2-5-3-5-2-4-2-4-3-4-3-4-3-3-3-3-4-3-4-2-4-3-4-2-4-2-5-1-5-2-5-1-11-1-12-1-12 1-10 1-6 1-5 2-4 1-5 2-4 2-4 3-4 2-4 3-3 3-4 4-3 4-3 3-2 5-3 4-2 5-2 5-4 11-3 12-2 13-2 14-1 15v17 16l1 15 2 14 2 13 3 12 4 11 4 10 3 4 2 5 3 4 3 3 3 4 3 3 4 3 4 3 4 2 4 3 4 2 5 1 4 2 5 1 5 1h6l11 1h12l11-2 5-1 6-2 4-1 5-2 4-2 4-3 4-2 4-3 4-3 3-4 3-3 3-4 2-4 3-5 2-5 2-5 4-11 3-12 2-13 2-14 1-16z">
            <text:p/>
          </draw:path>
          <draw:polygon draw:style-name="gr25" draw:text-style-name="P20" draw:layer="layout" svg:width="0.444cm" svg:height="0.341cm" svg:x="7.773cm" svg:y="5.802cm" svg:viewBox="0 0 445 342" draw:points="196,342 196,129 196,117 195,107 194,97 193,88 191,80 188,73 187,70 186,67 184,64 183,62 181,60 179,57 177,55 175,54 172,52 170,50 167,49 164,48 161,47 158,46 151,44 143,43 135,43 130,43 126,44 122,44 118,45 114,46 110,47 106,48 103,50 99,52 96,54 93,56 89,59 86,61 84,64 81,67 78,70 76,74 73,78 71,81 69,86 65,94 63,103 60,113 59,124 58,135 57,147 57,342 2,342 2,78 1,31 1,16 0,10 0,6 53,6 53,7 53,7 53,9 53,15 54,30 55,64 56,64 61,55 65,47 70,40 75,33 81,27 86,22 92,18 97,14 103,11 110,8 116,5 123,3 130,2 138,1 146,0 154,0 163,0 172,1 180,2 188,4 196,6 202,9 209,12 214,15 217,17 220,19 222,22 225,24 229,29 233,35 237,41 240,48 243,56 245,64 246,64 251,55 255,48 260,41 265,35 271,29 276,24 282,19 288,15 295,11 301,8 308,6 315,4 323,2 331,1 339,0 348,0 360,0 372,2 382,4 387,5 392,7 396,9 401,11 405,13 409,16 412,18 416,21 419,24 422,28 425,31 427,35 430,39 432,44 434,48 436,53 439,64 442,76 443,89 445,103 445,118 445,342 390,342 390,129 390,117 389,107 388,97 386,88 385,80 382,73 381,70 380,67 378,64 376,62 375,60 373,57 371,55 368,54 366,52 363,50 361,49 358,48 355,47 351,46 344,44 337,43 328,43 319,44 315,44 311,45 307,46 303,47 299,48 296,50 292,52 289,54 286,56 283,58 280,61 277,64 274,67 271,70 269,74 267,77 265,81 263,85 259,94 256,103 254,113 252,124 251,135 251,147 251,342">
            <text:p/>
          </draw:polygon>
          <draw:path draw:style-name="gr25" draw:text-style-name="P20" draw:layer="layout" svg:width="0.285cm" svg:height="0.473cm" svg:x="8.3cm" svg:y="5.802cm" svg:viewBox="0 0 286 474" svg:d="M286 172l-2 42-3 18-3 17-4 16-6 15-6 13-7 11-8 11-10 9-10 7-11 6-12 5-13 4-14 2h-15-9l-9-1-9-1-8-1-8-2-8-3-7-3-7-3-6-4-6-5-5-4-6-6-4-5-5-6-3-7-4-7h-2 1v1 3 10l1 39v131h-56v-399l-1-44v-15l-1-10h54v1 2l1 6 1 23 1 22h1l4-8 4-7 5-6 5-6 5-5 5-5 6-5 6-4 6-3 7-3 7-2 8-2 8-2 9-1 9-1h10l15 1 14 2 7 1 6 2 6 2 6 2 6 3 5 3 6 4 5 3 4 4 5 5 4 5 4 5 4 5 3 6 3 6 3 6 6 15 4 15 3 17 3 19 1 20zM227 174v-17l-1-16-2-14-2-14-2-11-4-11-4-10-2-4-2-4-2-3-3-4-3-3-3-3-3-3-3-2-4-2-3-2-4-2-4-2-5-1-4-1-4-1h-5l-10-1h-8l-8 1-7 1-7 2-6 2-6 2-5 3-3 1-2 2-5 4-4 4-4 5-4 5-3 6-3 6-3 7-3 7-2 7-2 9-2 9-1 9-1 10-1 10v23 16l1 15 2 14 2 13 3 11 4 11 2 5 2 4 2 5 3 4 2 3 3 4 4 3 3 3 4 3 3 3 4 2 4 2 5 2 4 2 5 1 5 1 5 1 6 1h11 10l5-1 5-1 4-1 4-1 4-2 4-2 4-2 3-2 4-2 3-3 3-3 3-3 2-4 3-4 2-4 2-4 4-10 4-10 2-13 2-13 2-15 1-16z">
            <text:p/>
          </draw:path>
          <draw:polygon draw:style-name="gr25" draw:text-style-name="P20" draw:layer="layout" svg:width="0.269cm" svg:height="0.341cm" svg:x="8.652cm" svg:y="5.808cm" svg:viewBox="0 0 270 342" draw:points="56,0 56,213 57,229 57,236 58,242 59,249 60,254 61,260 63,264 64,269 66,273 69,277 71,280 74,283 77,286 80,289 83,291 87,293 91,294 96,296 101,297 106,298 112,298 119,299 125,299 135,298 144,297 149,296 153,295 157,294 161,292 165,290 169,288 173,286 176,283 180,281 183,278 186,275 189,271 192,268 194,264 197,260 199,256 203,248 206,238 209,228 211,218 212,207 212,195 212,0 268,0 268,264 268,311 269,326 269,332 270,336 217,336 217,335 217,335 217,333 216,327 216,312 215,278 214,278 209,287 204,294 198,302 193,308 187,314 181,319 175,324 169,328 163,331 156,334 148,336 141,338 133,340 124,341 116,342 106,342 93,342 81,340 69,338 59,335 54,333 49,331 44,329 40,327 36,324 32,321 29,318 26,315 22,311 20,307 17,303 14,299 12,294 10,289 6,278 4,266 2,253 0,239 0,224 0,0">
            <text:p/>
          </draw:polygon>
          <draw:polygon draw:style-name="gr25" draw:text-style-name="P20" draw:layer="layout" svg:width="0.161cm" svg:height="0.415cm" svg:x="8.971cm" svg:y="5.733cm" svg:viewBox="0 0 162 416" draw:points="162,409 155,410 148,412 141,413 134,414 127,415 120,416 113,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3,372 136,371 144,371 152,369 162,367">
            <text:p/>
          </draw:polygon>
          <draw:path draw:style-name="gr25" draw:text-style-name="P20" draw:layer="layout" svg:width="0.325cm" svg:height="0.347cm" svg:x="9.166cm" svg:y="5.802cm" svg:viewBox="0 0 326 348" svg:d="M101 348h-12l-11-2-11-2-10-3-5-1-4-2-4-3-4-2-4-3-4-2-3-3-4-4-3-3-3-4-2-3-3-4-2-4-2-4-2-5-2-4-2-10-2-10-2-11v-11l1-13 1-11 1-6 2-6 2-5 2-5 2-5 2-5 3-4 3-4 4-5 3-4 4-3 4-4 5-3 4-3 6-3 5-3 12-5 13-4 15-4 15-2 17-2 19-1 75-1v-18-10l-1-9-1-9-2-7-1-4-2-3-1-3-2-4-1-2-2-3-2-2-2-3-2-2-3-2-2-2-3-2-3-1-3-2-3-1-4-1-7-2-7-1-9-1h-9-9-8l-8 1-7 2-7 1-6 3-2 1-3 1-2 2-2 1-2 2-2 2-2 2-2 2-2 2-1 2-2 2-1 3-2 5-2 6-2 6-1 7-58-5 2-11 3-11 4-9 5-9 5-8 7-8 7-6 8-6 8-6 10-4 11-4 11-3 12-3 13-2 14-1h14 16l14 2 13 2 13 3 11 4 6 3 5 2 5 3 4 3 5 4 4 3 4 4 3 4 3 4 4 4 2 5 3 4 2 5 3 5 1 6 2 5 3 12 1 13 1 13v145 6 5 5l1 5 1 5 1 4 2 4 1 3 1 1 1 2 1 1 1 1 1 2 2 1h1l2 1 1 1 2 1h2l1 1h2 2 5 2 2 4l5-1 5-1v35l-10 2-11 2-11 1h-11-7l-7-1-7-1-3-1-3-1-2-1-3-1-3-2-2-1-2-2-2-1-2-2-2-2-2-2-1-3-2-2-1-3-3-5-2-6-2-7-1-7-1-8-1-8h-2l-5 9-6 8-6 8-6 7-6 7-7 6-7 5-7 4-7 4-8 3-8 3-8 2-9 2-9 1-10 1zM114 306h8l7-1 7-1 7-1 7-2 6-3 7-3 6-3 5-3 6-4 5-5 5-4 5-5 4-6 4-5 3-6 4-6 2-6 3-7 2-6 1-6 1-6 1-7v-6-28l-61 1-18 1-9 1-8 1-7 1-6 1-6 2-6 1-5 2-4 3-5 2-4 3-3 3-4 3-3 4-3 3-2 4-3 5-1 4-2 5-1 6-1 5v6l-1 6 1 7v6l1 6 2 5 1 3 1 2 1 3 2 2 1 2 2 2 1 2 2 2 2 2 2 2 2 1 2 2 3 1 2 1 2 1 3 1 5 2 6 1 6 1z">
            <text:p/>
          </draw:path>
          <draw:path draw:style-name="gr25" draw:text-style-name="P20" draw:layer="layout" svg:width="0.285cm" svg:height="0.466cm" svg:x="9.518cm" svg:y="5.684cm" svg:viewBox="0 0 286 467" svg:d="M228 407l-4 8-4 7-5 6-5 6-5 6-6 5-6 4-6 4-7 3-7 3-7 3-8 1-8 2-8 1-9 1h-10l-15-1-7-1-7-1-7-1-7-2-6-2-6-3-5-3-6-3-5-3-5-4-5-4-4-5-4-5-4-5-4-5-3-6-3-6-3-7-5-14-5-16-3-17-2-18-2-20v-21l2-41 2-18 4-17 4-16 5-15 7-13 7-11 8-11 9-9 10-7 11-6 12-5 13-4 14-2h15 10l9 1 8 1 8 1 8 2 7 3 7 2 7 4 6 3 6 5 6 4 5 6 5 6 5 6 4 7 4 7h1l-1-38v-139h56v392 43l1 15 1 11h-54v-2-2l-1-4-1-15-1-31zM59 293v17l1 15 1 15 2 13 3 12 3 11 4 9 2 4 2 4 3 4 2 4 3 3 3 3 3 2 3 3 4 2 4 2 3 2 5 2 4 1 4 1 5 1h5l10 1 11-1h6l5-1 5-1 5-2 4-1 5-2 4-3 4-2 4-3 3-3 4-3 3-3 3-4 2-4 3-4 2-5 5-10 4-11 3-12 2-13 2-15 1-15v-17-16l-1-15-2-14-2-13-3-12-4-10-2-5-3-5-2-4-3-4-2-4-3-3-3-4-4-3-3-2-4-3-4-2-4-2-5-2-4-2-5-1-5-1-5-1-5-1h-12-10l-5 1-4 1-5 1-4 1-4 2-4 2-4 2-3 2-4 3-3 3-3 3-3 3-2 3-3 4-2 4-2 5-4 9-3 11-3 12-2 13-1 15-1 16z">
            <text:p/>
          </draw:path>
          <draw:path draw:style-name="gr25" draw:text-style-name="P20" draw:layer="layout" svg:width="0.299cm" svg:height="0.347cm" svg:x="9.869cm" svg:y="5.801cm" svg:viewBox="0 0 300 348" svg:d="M300 174l-1 21-2 20-3 19-4 17-5 15-4 8-3 7-4 6-4 7-4 6-5 5-5 5-5 5-6 5-5 4-7 4-6 3-7 4-6 2-8 3-7 2-16 4-17 2h-17-18l-17-3-8-1-8-2-7-2-7-3-7-3-6-3-7-4-5-4-6-4-6-5-5-5-4-6-5-5-4-6-4-7-4-6-3-7-3-8-6-15-4-17-3-18-1-20-1-20 1-21 1-20 3-18 4-17 6-16 6-14 8-13 9-12 10-10 11-9 12-7 14-6 14-5 16-3 17-2 18-1 19 1 17 2 16 3 8 2 7 3 7 2 7 4 6 3 6 4 6 4 5 4 5 5 5 5 4 6 4 6 4 6 3 6 4 7 3 8 5 15 4 18 3 18 1 20zM241 174v-17l-1-16-2-14-2-13-3-12-3-11-2-5-3-5-2-4-2-4-3-4-3-4-3-3-3-3-4-3-4-2-4-3-4-2-4-2-5-1-5-2-5-1-11-1-12-1-12 1-10 1-6 1-5 2-4 1-5 2-4 2-4 3-4 2-4 3-3 3-4 4-3 4-3 3-2 5-3 4-2 5-2 5-4 11-3 12-2 13-2 14-1 15v17 16l1 15 2 14 2 13 3 12 4 11 4 10 3 4 2 5 3 4 3 3 3 4 3 3 4 3 4 3 4 2 4 3 4 2 5 1 4 2 5 1 5 1h6l11 1h12l11-2 5-1 6-2 4-1 5-2 4-2 4-3 4-2 4-3 4-3 3-4 3-3 3-4 2-4 3-5 2-5 2-5 4-11 3-12 2-13 2-14 1-16z">
            <text:p/>
          </draw:path>
          <draw:polygon draw:style-name="gr25" draw:text-style-name="P20" draw:layer="layout" svg:width="0.158cm" svg:height="0.341cm" svg:x="10.236cm" svg:y="5.802cm" svg:viewBox="0 0 159 342" draw:points="2,342 2,84 0,6 53,6 55,75 56,75 60,64 63,55 67,46 71,38 75,32 79,25 83,20 85,18 87,16 89,14 92,12 94,10 97,9 99,7 102,6 108,4 114,2 121,1 128,0 136,0 139,0 142,0 145,0 147,1 150,1 153,2 159,3 159,54 156,54 153,53 149,52 146,52 138,51 129,51 125,51 121,52 117,52 113,53 109,54 105,55 102,57 98,59 95,61 92,63 89,65 86,68 83,71 81,74 78,78 76,81 72,89 68,98 65,107 62,118 60,129 59,141 58,153 58,167 58,342">
            <text:p/>
          </draw:polygon>
          <draw:path draw:style-name="gr25" draw:text-style-name="P20" draw:layer="layout" svg:width="0.325cm" svg:height="0.347cm" svg:x="10.432cm" svg:y="5.802cm" svg:viewBox="0 0 326 348" svg:d="M101 348h-12l-11-2-11-2-10-3-5-1-4-2-4-3-4-2-4-3-4-2-3-3-4-4-3-3-3-4-2-3-3-4-2-4-2-4-2-5-2-4-2-10-2-10-2-11v-11l1-13 1-11 1-6 2-6 2-5 2-5 2-5 2-5 3-4 3-4 4-5 3-4 4-3 4-4 5-3 4-3 6-3 5-3 12-5 13-4 15-4 15-2 17-2 19-1 75-1v-18-10l-1-9-1-9-2-7-1-4-2-3-1-3-2-4-1-2-2-3-2-2-2-3-2-2-3-2-2-2-3-2-3-1-3-2-3-1-4-1-7-2-7-1-9-1h-9-9-8l-8 1-7 2-7 1-6 3-2 1-3 1-2 2-2 1-2 2-2 2-2 2-2 2-2 2-1 2-2 2-1 3-2 5-2 6-2 6-1 7-58-5 2-11 3-11 4-9 5-9 5-8 7-8 7-6 8-6 8-6 10-4 11-4 11-3 12-3 13-2 14-1h14 16l14 2 13 2 13 3 11 4 6 3 5 2 5 3 4 3 5 4 4 3 4 4 3 4 3 4 4 4 2 5 3 4 2 5 3 5 1 6 2 5 3 12 1 13 1 13v145 6 5 5l1 5 1 5 1 4 2 4 1 3 1 1 1 2 1 1 1 1 1 2 2 1h1l2 1 1 1 2 1h2l1 1h2 2 5 2 2 4l5-1 5-1v35l-10 2-11 2-11 1h-11-7l-7-1-7-1-3-1-3-1-2-1-3-1-3-2-2-1-2-2-2-1-2-2-2-2-2-2-1-3-2-2-1-3-3-5-2-6-2-7-1-7-1-8-1-8h-2l-5 9-6 8-6 8-6 7-6 7-7 6-7 5-7 4-7 4-8 3-8 3-8 2-9 2-9 1-10 1zM114 306h8l7-1 7-1 7-1 7-2 6-3 7-3 6-3 5-3 6-4 5-5 5-4 5-5 4-6 4-5 3-6 4-6 2-6 3-7 2-6 1-6 1-6 1-7v-6-28l-61 1-18 1-9 1-8 1-7 1-6 1-6 2-6 1-5 2-4 3-5 2-4 3-3 3-4 3-3 4-3 3-2 4-3 5-1 4-2 5-1 6-1 5v6l-1 6 1 7v6l1 6 2 5 1 3 1 2 1 3 2 2 1 2 2 2 1 2 2 2 2 2 2 2 2 1 2 2 3 1 2 1 2 1 3 1 5 2 6 1 6 1z">
            <text:p/>
          </draw:path>
          <draw:path draw:style-name="gr25" draw:text-style-name="P20" draw:layer="layout" svg:width="0.337cm" svg:height="0.437cm" svg:x="7.678cm" svg:y="6.418cm" svg:viewBox="0 0 338 438" svg:d="M338 132l-1 15-2 14-1 7-2 7-2 6-2 6-3 6-3 6-3 6-4 5-4 6-4 5-5 5-5 4-5 5-5 4-6 4-6 3-6 4-6 3-13 5-14 4-16 3-16 1-16 1h-129v171h-59v-438h184l18 1 17 1 15 3 15 4 14 4 6 3 6 3 6 4 6 3 5 4 6 4 5 5 4 5 4 4 4 5 4 6 3 5 3 6 3 6 2 6 2 7 2 6 1 7 2 14zM278 132v-10l-1-10-2-9-3-8-4-7-4-7-5-7-6-5-7-5-7-5-9-3-9-3-10-3-10-1-12-1-12-1h-118v173h120 12l11-1 11-2 10-2 9-3 8-4 7-5 7-5 5-6 5-6 5-7 3-8 3-9 2-9 1-10z">
            <text:p/>
          </draw:path>
          <draw:polygon draw:style-name="gr25" draw:text-style-name="P20" draw:layer="layout" svg:width="0.158cm" svg:height="0.341cm" svg:x="8.091cm" svg:y="6.513cm" svg:viewBox="0 0 159 342" draw:points="2,342 2,84 0,6 53,6 55,75 56,75 60,64 63,55 67,46 71,38 75,32 79,25 83,20 85,18 87,16 89,14 92,12 94,10 97,9 99,7 102,6 108,4 114,2 121,1 128,0 136,0 139,0 142,0 145,0 147,1 150,1 153,2 159,3 159,54 156,54 153,53 149,52 146,52 138,51 129,51 125,51 121,52 117,52 113,53 109,54 105,55 102,57 98,59 95,61 92,63 89,65 86,68 83,71 81,74 78,78 76,81 72,89 68,98 65,107 62,118 60,129 59,141 58,153 58,167 58,342">
            <text:p/>
          </draw:polygon>
          <draw:path draw:style-name="gr25" draw:text-style-name="P20" draw:layer="layout" svg:width="0.055cm" svg:height="0.46cm" svg:x="8.303cm" svg:y="6.395cm" svg:viewBox="0 0 56 461" svg:d="M0 53v-53h56v53zM0 461v-336h56v336z">
            <text:p/>
          </draw:path>
          <draw:polygon draw:style-name="gr25" draw:text-style-name="P20" draw:layer="layout" svg:width="0.269cm" svg:height="0.341cm" svg:x="8.443cm" svg:y="6.513cm" svg:viewBox="0 0 270 342" draw:points="214,342 214,129 213,113 213,106 212,100 211,93 210,88 209,82 207,78 205,73 203,69 201,65 199,62 196,59 193,56 190,53 186,51 183,49 178,48 174,46 169,45 163,44 157,44 151,43 144,43 135,44 125,45 121,46 117,47 112,48 108,50 105,52 101,54 97,56 94,59 90,61 87,64 84,67 81,71 78,74 75,78 73,82 71,86 67,94 63,104 61,114 59,124 58,135 58,147 58,342 2,342 2,78 1,31 1,16 0,10 0,6 53,6 53,7 53,7 53,9 53,15 54,30 55,64 56,64 61,55 66,48 71,40 77,34 83,28 88,23 94,18 101,14 107,11 114,8 121,6 129,4 137,2 145,1 154,0 163,0 177,0 189,2 201,4 211,7 216,9 221,11 225,13 230,15 234,18 237,21 241,24 244,27 247,31 250,35 253,39 255,43 258,48 260,53 263,64 266,76 268,89 269,103 270,118 270,342">
            <text:p/>
          </draw:polygon>
          <draw:polygon draw:style-name="gr25" draw:text-style-name="P20" draw:layer="layout" svg:width="0.273cm" svg:height="0.347cm" svg:x="8.778cm" svg:y="6.513cm" svg:viewBox="0 0 274 348" draw:points="58,172 59,189 60,204 61,218 64,231 67,243 70,253 74,263 77,268 79,272 82,276 85,279 88,283 91,286 95,289 98,291 102,294 106,296 110,298 114,299 118,301 123,302 128,303 133,303 138,304 143,304 150,304 157,303 164,302 170,300 176,298 182,295 188,292 193,288 195,286 197,284 200,281 202,279 204,276 206,273 209,267 212,261 214,254 216,246 217,238 274,242 272,254 269,265 265,275 260,285 255,295 248,304 241,312 233,319 224,326 214,332 204,337 193,341 182,344 170,346 158,348 145,348 127,347 111,345 104,344 96,342 89,339 82,337 76,334 70,331 63,327 58,323 52,319 47,314 42,309 37,304 33,298 28,292 24,285 21,279 18,272 14,264 9,249 5,232 2,214 1,194 0,174 1,153 2,134 5,116 9,99 15,84 18,76 21,69 25,63 28,56 33,50 37,45 42,39 47,34 52,29 58,25 64,21 70,17 76,14 82,11 89,9 96,6 104,4 111,3 127,1 144,0 156,0 169,2 180,4 191,7 201,10 211,15 221,20 229,27 237,34 245,41 251,50 257,58 262,68 266,78 269,89 272,100 215,105 213,98 212,91 209,85 207,80 204,74 201,69 197,64 193,60 190,58 188,56 185,55 183,53 180,52 177,50 171,48 165,46 158,45 150,44 142,44 132,44 127,45 122,46 117,47 113,48 108,49 104,51 100,53 96,55 93,58 90,60 86,63 83,66 81,70 78,73 76,77 73,81 71,86 69,90 66,101 63,113 61,126 60,140 59,156">
            <text:p/>
          </draw:polygon>
          <draw:path draw:style-name="gr25" draw:text-style-name="P20" draw:layer="layout" svg:width="0.055cm" svg:height="0.46cm" svg:x="9.112cm" svg:y="6.395cm" svg:viewBox="0 0 56 461" svg:d="M0 53v-53h56v53zM0 461v-336h56v336z">
            <text:p/>
          </draw:path>
          <draw:path draw:style-name="gr25" draw:text-style-name="P20" draw:layer="layout" svg:width="0.285cm" svg:height="0.473cm" svg:x="9.249cm" svg:y="6.513cm" svg:viewBox="0 0 286 474" svg:d="M286 172l-2 42-3 18-3 17-4 16-6 15-6 13-7 11-8 11-10 9-10 7-11 6-12 5-13 4-14 2h-15-9l-9-1-9-1-8-1-8-2-8-3-7-3-7-3-6-4-6-5-5-4-6-6-4-5-5-6-3-7-4-7h-2 1v1 3 10l1 39v131h-56v-399l-1-44v-15l-1-10h54v1 2l1 6 1 23 1 22h1l4-8 4-7 5-6 5-6 5-5 5-5 6-5 6-4 6-3 7-3 7-2 8-2 8-2 9-1 9-1h10l15 1 14 2 7 1 6 2 6 2 6 2 6 3 5 3 6 4 5 3 4 4 5 5 4 5 4 5 4 5 3 6 3 6 3 6 6 15 4 15 3 17 3 19 1 20zM227 174v-17l-1-16-2-14-2-14-2-11-4-11-4-10-2-4-2-4-2-3-3-4-3-3-3-3-3-3-3-2-4-2-3-2-4-2-4-2-5-1-4-1-4-1h-5l-10-1h-8l-8 1-7 1-7 2-6 2-6 2-5 3-3 1-2 2-5 4-4 4-4 5-4 5-3 6-3 6-3 7-3 7-2 7-2 9-2 9-1 9-1 10-1 10v23 16l1 15 2 14 2 13 3 11 4 11 2 5 2 4 2 5 3 4 2 3 3 4 4 3 3 3 4 3 3 3 4 2 4 2 5 2 4 2 5 1 5 1 5 1 6 1h11 10l5-1 5-1 4-1 4-1 4-2 4-2 4-2 3-2 4-2 3-3 3-3 3-3 2-4 3-4 2-4 2-4 4-10 4-10 2-13 2-13 2-15 1-16z">
            <text:p/>
          </draw:path>
          <draw:path draw:style-name="gr25" draw:text-style-name="P20" draw:layer="layout" svg:width="0.325cm" svg:height="0.347cm" svg:x="9.587cm" svg:y="6.513cm" svg:viewBox="0 0 326 348" svg:d="M101 348h-12l-11-2-11-2-10-3-5-1-4-2-4-3-4-2-4-3-4-2-3-3-4-4-3-3-3-4-2-3-3-4-2-4-2-4-2-5-2-4-2-10-2-10-2-11v-11l1-13 1-11 1-6 2-6 2-5 2-5 2-5 2-5 3-4 3-4 4-5 3-4 4-3 4-4 5-3 4-3 6-3 5-3 12-5 13-4 15-4 15-2 17-2 19-1 75-1v-18-10l-1-9-1-9-2-7-1-4-2-3-1-3-2-4-1-2-2-3-2-2-2-3-2-2-3-2-2-2-3-2-3-1-3-2-3-1-4-1-7-2-7-1-9-1h-9-9-8l-8 1-7 2-7 1-6 3-2 1-3 1-2 2-2 1-2 2-2 2-2 2-2 2-2 2-1 2-2 2-1 3-2 5-2 6-2 6-1 7-58-5 2-11 3-11 4-9 5-9 5-8 7-8 7-6 8-6 8-6 10-4 11-4 11-3 12-3 13-2 14-1h14 16l14 2 13 2 13 3 11 4 6 3 5 2 5 3 4 3 5 4 4 3 4 4 3 4 3 4 4 4 2 5 3 4 2 5 3 5 1 6 2 5 3 12 1 13 1 13v145 6 5 5l1 5 1 5 1 4 2 4 1 3 1 1 1 2 1 1 1 1 1 2 2 1h1l2 1 1 1 2 1h2l1 1h2 2 5 2 2 4l5-1 5-1v35l-10 2-11 2-11 1h-11-7l-7-1-7-1-3-1-3-1-2-1-3-1-3-2-2-1-2-2-2-1-2-2-2-2-2-2-1-3-2-2-1-3-3-5-2-6-2-7-1-7-1-8-1-8h-2l-5 9-6 8-6 8-6 7-6 7-7 6-7 5-7 4-7 4-8 3-8 3-8 2-9 2-9 1-10 1zM114 306h8l7-1 7-1 7-1 7-2 6-3 7-3 6-3 5-3 6-4 5-5 5-4 5-5 4-6 4-5 3-6 4-6 2-6 3-7 2-6 1-6 1-6 1-7v-6-28l-61 1-18 1-9 1-8 1-7 1-6 1-6 2-6 1-5 2-4 3-5 2-4 3-3 3-4 3-3 4-3 3-2 4-3 5-1 4-2 5-1 6-1 5v6l-1 6 1 7v6l1 6 2 5 1 3 1 2 1 3 2 2 1 2 2 2 1 2 2 2 2 2 2 2 2 1 2 2 3 1 2 1 2 1 3 1 5 2 6 1 6 1z">
            <text:p/>
          </draw:path>
          <draw:polygon draw:style-name="gr25" draw:text-style-name="P20" draw:layer="layout" svg:width="0.055cm" svg:height="0.46cm" svg:x="9.954cm" svg:y="6.395cm" svg:viewBox="0 0 56 461" draw:points="0,461 0,0 56,0 56,461">
            <text:p/>
          </draw:polygon>
          <draw:polygon draw:style-name="gr25" draw:text-style-name="P20" draw:layer="layout" svg:width="0.363cm" svg:height="0.437cm" svg:x="8.011cm" svg:y="7.128cm" svg:viewBox="0 0 364 438" draw:points="291,438 116,226 59,270 59,438 0,438 0,0 59,0 59,219 270,0 340,0 153,190 364,438">
            <text:p/>
          </draw:polygon>
          <draw:path draw:style-name="gr25" draw:text-style-name="P20" draw:layer="layout" svg:width="0.325cm" svg:height="0.347cm" svg:x="8.408cm" svg:y="7.224cm" svg:viewBox="0 0 326 348" svg:d="M101 348h-12l-11-2-11-2-10-3-5-1-4-2-4-3-4-2-4-3-4-2-3-3-4-4-3-3-3-4-2-3-3-4-2-4-2-4-2-5-2-4-2-10-2-10-2-11v-11l1-13 1-11 1-6 2-6 2-5 2-5 2-5 2-5 3-4 3-4 4-5 3-4 4-3 4-4 5-3 4-3 6-3 5-3 12-5 13-4 15-4 15-2 17-2 19-1 75-1v-18-10l-1-9-1-9-2-7-1-4-2-3-1-3-2-4-1-2-2-3-2-2-2-3-2-2-3-2-2-2-3-2-3-1-3-2-3-1-4-1-7-2-7-1-9-1h-9-9-8l-8 1-7 2-7 1-6 3-2 1-3 1-2 2-2 1-2 2-2 2-2 2-2 2-2 2-1 2-2 2-1 3-2 5-2 6-2 6-1 7-58-5 2-11 3-11 4-9 5-9 5-8 7-8 7-6 8-6 8-6 10-4 11-4 11-3 12-3 13-2 14-1h14 16l14 2 13 2 13 3 11 4 6 3 5 2 5 3 4 3 5 4 4 3 4 4 3 4 3 4 4 4 2 5 3 4 2 5 3 5 1 6 2 5 3 12 1 13 1 13v145 6 5 5l1 5 1 5 1 4 2 4 1 3 1 1 1 2 1 1 1 1 1 2 2 1h1l2 1 1 1 2 1h2l1 1h2 2 5 2 2 4l5-1 5-1v35l-10 2-11 2-11 1h-11-7l-7-1-7-1-3-1-3-1-2-1-3-1-3-2-2-1-2-2-2-1-2-2-2-2-2-2-1-3-2-2-1-3-3-5-2-6-2-7-1-7-1-8-1-8h-2l-5 9-6 8-6 8-6 7-6 7-7 6-7 5-7 4-7 4-8 3-8 3-8 2-9 2-9 1-10 1zM114 306h8l7-1 7-1 7-1 7-2 6-3 7-3 6-3 5-3 6-4 5-5 5-4 5-5 4-6 4-5 3-6 4-6 2-6 3-7 2-6 1-6 1-6 1-7v-6-28l-61 1-18 1-9 1-8 1-7 1-6 1-6 2-6 1-5 2-4 3-5 2-4 3-3 3-4 3-3 4-3 3-2 4-3 5-1 4-2 5-1 6-1 5v6l-1 6 1 7v6l1 6 2 5 1 3 1 2 1 3 2 2 1 2 2 2 1 2 2 2 2 2 2 2 2 1 2 2 3 1 2 1 2 1 3 1 5 2 6 1 6 1z">
            <text:p/>
          </draw:path>
          <draw:path draw:style-name="gr25" draw:text-style-name="P20" draw:layer="layout" svg:width="0.055cm" svg:height="0.46cm" svg:x="8.776cm" svg:y="7.106cm" svg:viewBox="0 0 56 461" svg:d="M0 53v-53h56v53zM0 461v-336h56v336z">
            <text:p/>
          </draw:path>
          <draw:polygon draw:style-name="gr25" draw:text-style-name="P20" draw:layer="layout" svg:width="0.276cm" svg:height="0.346cm" svg:x="8.89cm" svg:y="7.224cm" svg:viewBox="0 0 277 347" draw:points="277,248 276,260 276,265 275,271 273,276 272,281 270,286 268,290 266,295 263,299 260,303 257,307 253,311 249,315 245,318 241,321 236,325 232,327 221,333 210,337 198,341 185,344 171,346 156,347 141,347 126,347 111,346 98,344 85,342 74,339 63,336 53,331 44,327 40,324 36,321 32,318 29,315 25,311 22,308 19,304 16,300 13,296 11,292 7,283 3,273 0,262 49,253 51,259 54,265 57,271 58,273 60,276 62,278 64,281 66,283 69,285 71,287 73,289 79,292 85,295 91,298 98,300 105,302 113,303 122,304 131,304 141,305 151,304 161,304 169,303 178,301 185,300 192,297 195,296 198,295 200,293 203,292 205,290 208,288 210,286 212,284 213,282 215,280 216,278 218,275 219,273 220,270 221,268 221,265 222,262 222,259 223,253 222,248 222,243 221,241 221,239 220,237 219,235 218,233 217,231 216,229 215,227 214,225 212,224 211,222 209,220 205,217 201,214 196,212 191,209 185,206 179,204 172,202 165,200 125,189 103,183 84,177 76,174 68,171 62,168 57,165 52,162 47,159 43,155 38,152 35,148 31,144 28,140 25,136 22,132 20,127 18,122 16,117 15,112 14,106 14,100 13,94 14,83 14,78 15,72 17,67 18,63 20,58 22,54 24,49 26,45 29,41 32,37 35,34 38,30 42,27 46,24 50,21 55,18 59,16 64,14 75,9 86,6 99,3 112,2 126,0 141,0 155,0 168,1 180,3 191,5 202,8 212,11 221,15 230,20 234,22 237,25 241,28 244,31 248,34 251,38 254,41 256,45 259,49 261,53 263,58 265,62 268,72 271,82 221,88 219,83 218,80 217,78 216,75 215,73 214,71 212,69 211,67 209,65 207,63 205,61 203,59 201,57 196,54 191,51 185,49 179,47 172,45 165,44 158,43 150,42 141,42 132,42 124,43 116,44 109,45 102,47 96,49 90,51 88,52 86,54 83,55 81,57 79,58 78,60 76,62 75,64 73,66 72,68 71,70 70,73 69,75 69,78 68,80 68,83 68,86 68,88 68,92 68,95 69,98 69,101 71,104 72,107 73,110 75,112 77,114 79,116 82,119 84,121 87,123 90,124 94,126 97,128 101,130 106,131 120,136 137,140 158,146 179,151 197,157 211,162 217,164 222,166 227,169 232,171 236,174 240,176 244,179 247,182 250,185 253,187 256,190 258,193 261,197 263,200 265,203 267,207 269,210 271,214 272,218 273,222 274,226 275,230 276,234 277,239 277,243">
            <text:p/>
          </draw:polygon>
          <draw:path draw:style-name="gr25" draw:text-style-name="P20" draw:layer="layout" svg:width="0.297cm" svg:height="0.347cm" svg:x="9.217cm" svg:y="7.223cm" svg:viewBox="0 0 298 348" svg:d="M59 186v14l1 13 2 13 3 11 3 11 4 10 2 4 3 5 3 4 2 4 4 4 3 3 3 4 4 3 4 3 3 2 5 2 4 3 4 1 5 2 5 1 5 1 5 1 5 1h11 9l8-1 8-1 8-1 7-2 7-3 6-3 5-3 6-4 4-4 5-4 4-5 3-4 3-5 3-6 2-5 49 14-4 9-5 9-5 9-6 8-6 7-7 6-8 6-8 5-9 5-10 4-10 4-10 2-11 2-12 2-13 1h-13-18l-17-2-16-4-7-2-7-3-7-3-7-3-6-4-6-4-6-4-6-5-5-5-5-5-5-6-4-6-4-6-4-7-4-7-3-7-5-16-5-17-3-19-1-20-1-21 1-20 1-19 3-18 5-17 5-15 3-7 4-7 4-7 4-6 4-6 5-6 5-5 5-5 6-5 5-4 6-4 7-4 6-3 7-3 7-3 8-2 15-3 17-2 17-1 18 1 17 2 15 3 15 5 13 6 12 8 11 9 10 11 9 12 7 13 7 14 5 16 4 18 3 19 1 20 1 22v7zM240 143l-1-13-2-12-3-11-3-10-3-9-5-8-2-4-2-4-3-3-3-3-3-3-3-3-3-3-3-2-4-2-3-2-4-2-4-2-4-1-4-1-9-2-10-1-10-1-10 1-9 1-5 1-4 1-4 1-4 2-4 2-4 2-4 2-3 3-4 2-3 3-3 3-3 4-3 3-3 4-5 7-4 9-3 9-3 9-2 11-2 11-1 11z">
            <text:p/>
          </draw:path>
          <draw:polygon draw:style-name="gr25" draw:text-style-name="P20" draw:layer="layout" svg:width="0.363cm" svg:height="0.437cm" svg:x="6.741cm" svg:y="7.839cm" svg:viewBox="0 0 364 438" draw:points="291,438 116,226 59,270 59,438 0,438 0,0 59,0 59,219 270,0 340,0 153,190 364,438">
            <text:p/>
          </draw:polygon>
          <draw:path draw:style-name="gr25" draw:text-style-name="P20" draw:layer="layout" svg:width="0.337cm" svg:height="0.436cm" svg:x="7.164cm" svg:y="7.839cm" svg:viewBox="0 0 338 437" svg:d="M338 314l-1 15-1 6-1 7-1 6-2 6-2 6-3 6-2 6-4 5-3 5-4 5-4 5-5 5-4 4-6 4-5 4-6 4-12 6-13 6-14 4-16 4-16 2-17 2h-19-177v-437h159l36 2 16 2 15 3 14 3 12 5 12 5 10 7 9 7 8 8 7 8 5 10 4 10 3 11 2 12 1 13-1 10-1 9-2 9-2 8-3 8-4 8-4 7-5 7-6 6-6 6-7 5-7 5-8 4-9 3-9 4-10 2 13 2 12 3 11 3 11 4 9 5 9 5 8 6 4 3 4 4 6 7 3 4 3 4 3 4 2 5 2 4 2 4 2 5 1 5 2 9 2 11zM253 113v-8l-1-4-1-4v-4l-1-3-2-4-1-3-2-3-1-3-2-3-3-2-2-3-3-2-2-2-3-2-3-2-4-2-7-3-7-3-9-2-9-1-10-2h-10l-11-1h-100v139h100 11l11-1 10-1 9-2 9-3 7-3 4-2 3-1 4-2 3-3 2-2 3-2 3-3 2-3 2-3 2-3 2-3 1-3 2-4 1-3 1-4 1-4 1-9zM278 310v-10l-2-8-2-9-3-7-3-7-5-6-6-6-6-5-7-5-8-4-9-3-10-3-11-2-11-1-12-1-13-1h-111v158h115 13l13-1 11-2 10-2 10-3 4-2 4-1 4-2 4-2 3-3 3-2 3-3 3-3 3-2 2-3 2-4 2-3 2-4 2-3 1-4 2-4 1-4 1-5 1-9z">
            <text:p/>
          </draw:path>
          <draw:path draw:style-name="gr25" draw:text-style-name="P20" draw:layer="layout" svg:width="0.432cm" svg:height="0.449cm" svg:x="7.566cm" svg:y="7.833cm" svg:viewBox="0 0 433 450" svg:d="M433 223v17l-1 16-2 16-3 15-4 15-4 14-6 14-6 13-7 13-7 12-9 11-9 10-9 9-11 9-11 8-12 7-12 7-14 5-13 5-14 4-15 3-15 2-16 2h-17-16l-16-2-15-2-15-3-14-4-14-4-13-6-13-6-12-8-11-7-10-9-10-10-9-10-8-11-7-12-7-12-6-13-6-14-4-14-4-15-2-16-2-15-2-17v-17l1-25 3-24 4-23 6-21 4-10 4-10 5-9 5-9 6-9 6-8 6-8 7-8 8-7 7-7 8-6 9-6 9-5 9-5 9-4 10-4 10-4 11-3 22-4 23-3 25-1h16l16 2 16 2 14 3 14 3 14 5 13 5 13 7 12 7 11 7 10 9 10 9 9 10 8 11 8 11 7 13 6 13 5 13 4 14 4 15 3 15 2 16 1 16zM373 223l-1-20-2-18-3-18-4-17-6-15-3-7-4-8-4-6-4-7-5-6-5-6-5-6-5-5-6-5-6-4-7-5-6-3-7-4-7-3-7-3-8-2-8-2-8-2-17-2-18-1-18 1-17 2-16 4-8 2-7 3-8 3-6 3-7 4-6 4-6 5-6 5-6 5-5 5-5 6-5 6-4 7-4 7-4 7-3 7-6 16-4 16-3 18-2 19-1 20 1 20 2 19 3 18 5 17 5 16 7 14 4 7 5 7 5 6 5 7 5 5 5 6 6 5 6 5 7 4 6 4 7 4 7 3 7 3 8 2 8 2 8 2 17 2 17 1 19-1 17-2 16-4 8-2 7-3 7-3 7-3 7-4 6-4 6-5 6-5 5-5 6-6 4-6 5-6 4-7 4-7 4-7 3-7 6-16 4-17 3-19 2-19z">
            <text:p/>
          </draw:path>
          <draw:polygon draw:style-name="gr25" draw:text-style-name="P20" draw:layer="layout" svg:width="0.395cm" svg:height="0.437cm" svg:x="8.045cm" svg:y="7.839cm" svg:viewBox="0 0 396 438" draw:points="331,438 199,246 65,438 0,438 166,210 13,0 78,0 200,172 318,0 383,0 234,208 396,438">
            <text:p/>
          </draw:polygon>
          <draw:polygon draw:style-name="gr25" draw:text-style-name="P20" draw:layer="layout" svg:width="0.154cm" svg:height="0.049cm" svg:x="8.482cm" svg:y="8.083cm" svg:viewBox="0 0 155 50" draw:points="0,50 0,0 155,0 155,50">
            <text:p/>
          </draw:polygon>
          <draw:polygon draw:style-name="gr25" draw:text-style-name="P20" draw:layer="layout" svg:width="0.365cm" svg:height="0.449cm" svg:x="8.694cm" svg:y="7.833cm" svg:viewBox="0 0 366 450" draw:points="366,323 365,331 365,338 364,345 363,352 361,358 359,365 357,371 354,377 351,383 347,388 343,393 339,398 334,403 329,408 324,413 318,417 312,421 306,425 292,431 277,437 261,442 244,445 226,448 206,449 185,450 147,448 130,446 114,443 98,439 84,434 71,429 59,422 48,415 38,407 29,397 21,388 14,377 8,365 4,352 0,339 57,327 60,337 64,346 68,354 70,358 73,362 76,365 78,368 82,372 85,375 88,378 92,380 96,383 100,385 108,390 117,393 127,397 138,399 149,401 161,403 174,403 187,404 201,403 214,403 227,401 238,399 249,396 259,393 268,389 276,384 280,382 283,379 286,376 289,373 292,370 295,367 297,363 299,360 301,356 303,352 304,348 305,344 306,340 306,335 307,331 307,326 307,321 306,316 306,311 305,307 303,303 301,299 299,295 297,291 295,288 292,285 289,282 285,279 282,277 278,274 274,272 270,269 265,267 260,265 250,261 239,258 228,255 173,242 149,236 128,231 110,225 102,222 95,219 88,216 82,213 76,210 71,207 66,204 61,200 56,197 52,194 49,190 45,186 42,182 39,178 36,174 33,170 31,165 29,160 27,156 25,151 24,145 23,140 22,135 21,129 21,123 20,117 21,110 21,103 22,97 23,91 25,84 27,78 29,73 31,67 34,62 37,57 41,52 45,47 49,43 53,38 58,34 63,30 69,27 75,23 87,17 101,12 116,8 132,4 149,2 167,0 186,0 204,0 221,1 237,3 252,6 266,9 278,13 290,17 300,23 305,26 310,29 314,32 318,36 322,40 326,44 330,49 334,54 340,64 346,75 351,87 355,101 297,111 294,102 291,95 287,87 283,81 281,78 278,75 276,72 273,69 270,67 267,65 264,62 260,60 253,57 246,54 237,51 228,49 219,47 208,46 197,45 186,45 173,45 161,46 150,47 140,49 130,51 121,54 113,58 109,60 106,62 102,64 99,67 96,69 94,72 91,75 89,78 87,81 85,84 83,87 82,90 81,94 80,98 79,102 79,106 78,110 78,114 78,119 79,124 80,128 81,132 82,136 84,140 86,144 89,147 92,151 95,154 98,157 102,159 106,162 110,165 115,167 120,170 125,172 132,174 150,180 172,186 200,192 240,202 250,204 260,207 269,210 278,213 287,217 296,220 305,224 313,229 317,231 320,233 324,236 328,239 331,242 334,245 337,248 340,251 343,254 346,258 349,261 351,265 353,269 355,273 357,277 359,281 360,286 362,291 363,296 364,301 365,306 365,312 365,317">
            <text:p/>
          </draw:polygon>
          <draw:polygon draw:style-name="gr25" draw:text-style-name="P20" draw:layer="layout" svg:width="0.259cm" svg:height="0.442cm" svg:x="9.276cm" svg:y="7.839cm" svg:viewBox="0 0 260 443" draw:points="132,443 118,443 105,442 93,439 82,436 71,432 61,427 52,421 43,415 35,407 28,399 22,389 16,379 11,368 7,356 3,342 0,329 58,319 60,328 62,336 64,344 67,351 70,358 74,364 78,370 83,375 88,380 91,382 93,384 96,386 99,387 102,389 105,390 108,391 111,392 115,393 118,394 125,395 132,395 140,395 147,394 151,393 154,392 158,391 161,390 164,388 167,387 170,385 173,383 175,381 178,378 181,376 183,373 185,370 187,367 189,364 191,361 193,357 194,354 197,346 199,337 200,328 201,318 202,308 202,48 118,48 118,0 260,0 260,307 260,322 258,337 256,351 252,364 250,370 247,376 244,382 241,387 238,392 234,397 230,402 226,407 222,411 217,415 212,419 207,423 202,426 197,429 191,432 185,434 179,436 173,438 160,441 146,443">
            <text:p/>
          </draw:polygon>
          <draw:path draw:style-name="gr25" draw:text-style-name="P20" draw:layer="layout" svg:width="0.292cm" svg:height="0.449cm" svg:x="9.617cm" svg:y="7.833cm" svg:viewBox="0 0 293 450" svg:d="M293 301l-1 17-1 15-3 16-4 14-6 13-3 6-3 6-4 6-4 5-4 6-5 5-4 5-5 4-6 5-5 3-6 4-6 3-6 3-6 3-7 2-7 2-14 3-15 2-16 1-18-1-9-1-8-1-8-2-8-3-7-3-7-3-7-3-7-4-6-5-6-5-6-5-6-6-5-6-5-7-5-7-4-7-8-17-7-17-5-19-5-21-3-22-1-24-1-26 1-27 2-26 3-25 4-22 6-21 7-19 8-18 5-8 5-8 5-8 5-6 6-7 6-6 6-5 7-5 7-5 7-4 7-3 8-3 8-3 8-2 8-2 9-1 9-1h9 12l12 1 11 2 10 3 10 3 9 4 9 4 8 5 7 6 7 7 7 7 5 8 6 9 4 9 4 10 4 11-53 10-3-7-2-6-3-5-3-6-4-4-3-5-4-4-5-3-4-3-5-3-5-2-6-2-6-2-6-1h-7l-6-1h-6l-6 1-6 1-5 1-5 2-5 2-5 2-5 2-4 3-5 4-4 3-4 4-4 5-3 4-4 5-3 6-6 12-6 13-4 14-4 15-3 17-2 18-1 19v21l3-7 5-7 5-6 5-5 5-5 6-5 7-4 6-4 7-4 8-3 7-2 8-2 8-2 8-1 9-1h9l14 1 14 1 13 3 7 2 6 2 6 3 5 3 6 3 5 3 5 4 5 4 5 4 5 5 4 5 4 5 4 5 3 5 3 6 3 6 5 12 4 13 3 14 1 15zM236 303v-11l-1-11-2-10-3-10-3-9-2-4-2-4-2-4-3-3-2-4-3-3-3-3-3-3-3-3-4-2-3-3-4-2-4-2-4-1-4-2-4-1-9-2-10-1-10-1h-9l-9 2-9 1-8 3-4 1-4 2-3 2-4 2-3 2-4 3-3 2-3 3-3 3-3 3-2 3-2 3-3 4-2 3-1 4-2 4-1 4-2 4-1 9-2 9v10 12l2 12 2 11 2 11 4 10 4 9 5 9 6 9 6 7 4 4 3 3 4 3 4 2 4 3 4 2 4 2 4 1 4 2 4 1 5 1h5l4 1h5 10l9-2 5-1 4-1 4-1 4-2 4-2 4-2 3-2 4-2 3-3 3-3 3-3 3-3 3-4 3-3 2-4 2-4 4-8 4-9 2-10 2-10 1-11z">
            <text:p/>
          </draw:path>
          <draw:path draw:style-name="gr25" draw:text-style-name="P20" draw:layer="layout" svg:width="0.319cm" svg:height="0.437cm" svg:x="9.95cm" svg:y="7.839cm" svg:viewBox="0 0 320 438" svg:d="M259 339v99h-53v-99h-206v-44l200-295h59v294h61v45zM206 63v1l-1 1-2 3-6 12-7 12-3 5-2 3-112 165-17 23-5 6h155z">
            <text:p/>
          </draw:path>
          <draw:polygon draw:style-name="gr25" draw:text-style-name="P20" draw:layer="layout" svg:width="0.273cm" svg:height="0.437cm" svg:x="10.335cm" svg:y="7.839cm" svg:viewBox="0 0 274 438" draw:points="0,438 0,390 111,390 111,53 13,124 13,71 116,0 167,0 167,390 274,390 274,438">
            <text:p/>
          </draw:polygon>
          <draw:polygon draw:style-name="gr25" draw:text-style-name="P20" draw:layer="layout" svg:width="0.288cm" svg:height="0.443cm" svg:x="10.67cm" svg:y="7.833cm" svg:viewBox="0 0 289 444" draw:points="0,444 0,405 4,396 8,387 13,378 18,370 22,362 28,355 33,347 39,340 50,327 62,314 74,302 87,290 136,248 148,239 160,229 171,219 181,210 190,200 195,195 199,190 203,185 206,180 210,175 213,170 216,164 218,159 220,153 222,147 223,141 224,135 225,128 225,122 225,113 224,105 222,97 221,93 220,90 218,86 217,83 215,80 213,77 211,74 209,71 207,68 204,66 201,63 198,61 196,59 192,57 189,55 186,54 182,52 179,51 171,49 163,47 155,46 145,46 137,46 128,47 120,49 113,51 106,54 99,57 93,61 87,65 84,68 81,70 79,73 76,76 74,79 72,82 70,85 68,89 65,96 63,103 61,111 60,120 2,115 5,102 8,90 12,78 17,67 20,62 23,57 26,53 30,48 38,39 47,31 57,24 67,17 79,12 91,8 103,4 117,2 131,0 145,0 161,0 177,2 191,4 204,8 216,12 222,15 227,18 233,21 238,24 242,27 247,31 251,35 255,39 259,44 262,48 266,53 269,58 271,64 274,69 276,75 277,80 280,93 282,106 282,120 282,126 282,133 281,139 280,145 278,152 276,158 274,164 271,170 268,177 264,183 261,189 256,196 252,202 247,208 242,214 236,221 230,227 222,235 203,253 178,274 149,299 132,313 117,326 103,339 92,351 87,357 82,363 78,369 74,374 70,380 67,385 64,391 61,396 289,396 289,444">
            <text:p/>
          </draw:polygon>
        </draw:g>
        <draw:g>
          <draw:custom-shape draw:style-name="gr26" draw:text-style-name="P21" draw:layer="layout" svg:width="7.15cm" svg:height="4.25cm" svg:x="16cm" svg:y="0.05cm">
            <text:p/>
            <draw:enhanced-geometry svg:viewBox="0 0 21600 21600" draw:type="rectangle" draw:enhanced-path="M 0 0 L 21600 0 21600 21600 0 21600 0 0 Z N"/>
          </draw:custom-shape>
          <draw:frame draw:style-name="gr27" draw:text-style-name="P23" draw:layer="layout" svg:width="5.9cm" svg:height="0.802cm" svg:x="17.05cm" svg:y="3.377cm">
            <draw:text-box>
              <text:p text:style-name="P22"><text:span text:style-name="T5">Subsistema de </text:span><text:span text:style-name="T5">sensores</text:span></text:p>
            </draw:text-box>
          </draw:frame>
          <draw:frame draw:style-name="gr27" draw:text-style-name="P23" draw:layer="layout" svg:width="6.09cm" svg:height="0.802cm" svg:x="17.05cm" svg:y="2.577cm">
            <draw:text-box>
              <text:p text:style-name="P22"><text:span text:style-name="T5">Subsi</text:span><text:span text:style-name="T5">stema </text:span><text:span text:style-name="T5">de </text:span><text:span text:style-name="T5">telem</text:span><text:span text:style-name="T5">etría</text:span></text:p>
            </draw:text-box>
          </draw:frame>
          <draw:frame draw:style-name="gr27" draw:text-style-name="P23" draw:layer="layout" svg:width="5.108cm" svg:height="0.802cm" svg:x="17.05cm" svg:y="1.777cm">
            <draw:text-box>
              <text:p text:style-name="P22"><text:span text:style-name="T5">Subsi</text:span><text:span text:style-name="T5">stema </text:span><text:span text:style-name="T5">de </text:span><text:span text:style-name="T5">audio</text:span></text:p>
            </draw:text-box>
          </draw:frame>
          <draw:frame draw:style-name="gr27" draw:text-style-name="P23" draw:layer="layout" svg:width="4.257cm" svg:height="0.802cm" svg:x="17.05cm" svg:y="0.177cm">
            <draw:text-box>
              <text:p text:style-name="P22"><text:span text:style-name="T5">Siste</text:span><text:span text:style-name="T5">ma </text:span><text:span text:style-name="T5">princi</text:span><text:span text:style-name="T5">pal</text:span></text:p>
            </draw:text-box>
          </draw:frame>
          <draw:frame draw:style-name="gr27" draw:text-style-name="P23" draw:layer="layout" svg:width="5.574cm" svg:height="0.802cm" svg:x="17.05cm" svg:y="0.977cm">
            <draw:text-box>
              <text:p text:style-name="P22"><text:span text:style-name="T5">Subsi</text:span><text:span text:style-name="T5">stema </text:span><text:span text:style-name="T5">de </text:span><text:span text:style-name="T5">energí</text:span><text:span text:style-name="T5">a</text:span></text:p>
            </draw:text-box>
          </draw:frame>
          <draw:custom-shape draw:style-name="gr28" draw:text-style-name="P24" draw:layer="layout" svg:width="0.5cm" svg:height="0.5cm" svg:x="16.301cm" svg:y="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5" draw:layer="layout" svg:width="0.5cm" svg:height="0.5cm" svg:x="16.301cm" svg:y="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6" draw:layer="layout" svg:width="0.5cm" svg:height="0.5cm" svg:x="16.301cm" svg:y="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draw:layer="layout" svg:width="0.5cm" svg:height="0.5cm" svg:x="16.301cm" svg:y="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9" draw:layer="layout" svg:width="0.5cm" svg:height="0.5cm" svg:x="16.3cm" svg:y="0.4cm">
            <text:p text:style-name="P28"/>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23.2cm" fo:page-height="1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7-31T15:37:32.640853792</meta:creation-date>
    <dc:date>2026-06-27T19:42:44.545885120</dc:date>
    <meta:editing-duration>PT28M26S</meta:editing-duration>
    <meta:editing-cycles>7</meta:editing-cycles>
    <meta:generator>LibreOffice/7.3.7.2$Linux_X86_64 LibreOffice_project/30$Build-2</meta:generator>
    <meta:document-statistic meta:object-count="88"/>
  </office:meta>
</office:document-meta>
</file>