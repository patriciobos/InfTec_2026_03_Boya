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48cm" fo:min-width="2.23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 style:list-style-name="L1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48cm" fo:min-width="2.23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 style:list-style-name="L1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48cm" fo:min-width="2.23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 style:list-style-name="L1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48cm" fo:min-width="2.2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svg:stroke-width="0.1cm" draw:marker-start-width="0.35cm" draw:marker-end-width="0.35cm" draw:fill="solid" draw:fill-color="#ffd7d7" draw:textarea-horizontal-align="justify" draw:textarea-vertical-align="middle" draw:auto-grow-height="false" fo:min-height="2.58cm" fo:min-width="2.33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 style:list-style-name="L1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48cm" fo:min-width="2.23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13" style:family="graphic" style:parent-style-name="objectwithoutfill">
      <style:graphic-properties draw:stroke="dash" draw:stroke-dash="Long_20_Dot"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2" style:family="paragraph">
      <loext:graphic-properties draw:fill="solid" draw:fill-color="#dee6ef"/>
      <style:paragraph-properties fo:text-align="center" style:writing-mode="lr-tb"/>
      <style:text-properties fo:font-size="14pt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4" style:family="paragraph">
      <loext:graphic-properties draw:fill="solid" draw:fill-color="#dee6ef"/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Liberation Sans" fo:font-size="14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="solid" draw:fill-color="#ffd7d7"/>
      <style:paragraph-properties fo:text-align="center" style:writing-mode="lr-tb"/>
      <style:text-properties style:font-name="Liberation Sans" fo:font-size="14pt" style:letter-kerning="true" style:font-name-asian="Noto Sans CJK SC" style:font-size-asian="18pt" style:font-name-complex="Noto Sans Devanagari" style:font-size-complex="18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Liberation Sans" fo:font-size="13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10" style:family="paragraph">
      <loext:graphic-properties draw:fill="solid" draw:fill-color="#dee6ef"/>
      <style:paragraph-properties fo:margin-left="0cm" fo:margin-right="0cm" fo:text-align="center" fo:text-indent="0cm" style:writing-mode="lr-tb"/>
      <style:text-properties style:font-name="Liberation Sans" fo:font-size="13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3" style:family="text">
      <style:text-properties fo:font-size="13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DISABLE" draw:style-name="gr1" draw:text-style-name="P2" xml:id="id2" draw:id="id2" draw:layer="layout" svg:width="4cm" svg:height="4cm" svg:x="0.097cm" svg:y="2.744cm">
          <text:p text:style-name="P1"><text:span text:style-name="T1">DIS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ISABLE 1" draw:style-name="gr2" draw:text-style-name="P4" xml:id="id3" draw:id="id3" draw:layer="layout" svg:width="4cm" svg:height="4cm" svg:x="6.198cm" svg:y="2.745cm">
          <text:p text:style-name="P3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ISABLE 2" draw:style-name="gr3" draw:text-style-name="P4" xml:id="id4" draw:id="id4" draw:layer="layout" svg:width="4cm" svg:height="4cm" svg:x="11.622cm" svg:y="6.294cm">
          <text:p text:style-name="P3">TE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ISABLE 3" draw:style-name="gr4" draw:text-style-name="P4" xml:id="id5" draw:id="id5" draw:layer="layout" svg:width="4cm" svg:height="4cm" svg:x="11.622cm" svg:y="11.544cm">
          <text:p text:style-name="P3">I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0.75cm" svg:height="0.75cm" svg:x="0.097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0.847cm" svg:y1="1.019cm" svg:x2="2.097cm" svg:y2="2.744cm" draw:start-shape="id1" draw:start-glue-point="10" draw:end-shape="id2" draw:end-glue-point="4" svg:d="M847 1019c834 0 1250 575 1250 1725" svg:viewBox="0 0 1251 1726">
          <text:p/>
        </draw:connector>
        <draw:connector draw:style-name="gr6" draw:text-style-name="P6" draw:layer="layout" draw:type="curve" svg:x1="4.097cm" svg:y1="4.744cm" svg:x2="6.198cm" svg:y2="4.745cm" draw:end-shape="id3" draw:end-glue-point="6" svg:d="M4097 4744c1164 0 114 1 2101 1" svg:viewBox="0 0 2102 2">
          <text:p/>
        </draw:connector>
        <draw:connector draw:style-name="gr6" draw:text-style-name="P6" draw:layer="layout" draw:type="curve" svg:x1="10.198cm" svg:y1="4.745cm" svg:x2="13.622cm" svg:y2="6.294cm" draw:start-shape="id3" draw:start-glue-point="10" draw:end-shape="id4" draw:end-glue-point="4" svg:d="M10198 4745c2283 0 3424 516 3424 1549" svg:viewBox="0 0 3425 1550">
          <text:p/>
        </draw:connector>
        <draw:connector draw:style-name="gr6" draw:text-style-name="P6" draw:layer="layout" draw:type="curve" svg:x1="13.622cm" svg:y1="10.294cm" svg:x2="13.622cm" svg:y2="11.544cm" draw:start-shape="id4" draw:start-glue-point="8" draw:end-shape="id5" draw:end-glue-point="4" svg:d="M13622 10294v1250" svg:viewBox="0 0 1 1251">
          <text:p/>
        </draw:connector>
        <draw:custom-shape draw:name="DISABLE 4" draw:style-name="gr7" draw:text-style-name="P8" xml:id="id7" draw:id="id7" draw:layer="layout" svg:width="4cm" svg:height="4cm" svg:x="3.701cm" svg:y="7.688cm">
          <text:p text:style-name="P7"><text:span text:style-name="T2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ISABLE 5" draw:style-name="gr8" draw:text-style-name="P10" xml:id="id6" draw:id="id6" draw:layer="layout" svg:width="4cm" svg:height="4cm" svg:x="4.697cm" svg:y="12.944cm">
          <text:p text:style-name="P9"><text:span text:style-name="T3">ACQUI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draw:line-skew="0.995cm" svg:x1="12.207cm" svg:y1="14.959cm" svg:x2="8.697cm" svg:y2="14.944cm" draw:start-shape="id5" draw:start-glue-point="7" draw:end-shape="id6" draw:end-glue-point="10" svg:d="M12207 14959c-1578 0 177-15-3510-15" svg:viewBox="0 0 3511 16">
          <text:p/>
        </draw:connector>
        <draw:connector draw:style-name="gr6" draw:text-style-name="P6" draw:layer="layout" draw:type="curve" svg:x1="8.112cm" svg:y1="13.529cm" svg:x2="11.622cm" svg:y2="13.544cm" draw:start-shape="id6" draw:start-glue-point="11" draw:end-shape="id5" draw:end-glue-point="6" svg:d="M8112 13529c3072 0 1317 15 3510 15" svg:viewBox="0 0 3511 16">
          <text:p/>
        </draw:connector>
        <draw:connector draw:style-name="gr6" draw:text-style-name="P6" draw:layer="layout" draw:type="curve" svg:x1="12.207cm" svg:y1="9.709cm" svg:x2="7.701cm" svg:y2="9.688cm" draw:start-shape="id4" draw:start-glue-point="7" draw:end-shape="id7" draw:end-glue-point="10" svg:d="M12207 9709c-3816 0-1563-21-4506-21" svg:viewBox="0 0 4507 22">
          <text:p/>
        </draw:connector>
        <draw:frame draw:style-name="gr9" draw:text-style-name="P12" draw:layer="layout" svg:width="2.5cm" svg:height="0.725cm" svg:x="3.997cm" svg:y="3.894cm">
          <draw:text-box>
            <text:p text:style-name="P11"><text:span text:style-name="T4">SIG_INIT</text:span></text:p>
          </draw:text-box>
        </draw:frame>
        <draw:frame draw:style-name="gr10" draw:text-style-name="P12" draw:layer="layout" svg:width="4.1cm" svg:height="1.673cm" svg:x="8.797cm" svg:y="15.195cm">
          <draw:text-box>
            <text:p text:style-name="P11"><text:span text:style-name="T4">SIG_TIMEOUT /</text:span></text:p>
            <text:p text:style-name="P11"><text:span text:style-name="T4">SIG_ACQUIRE</text:span></text:p>
          </draw:text-box>
        </draw:frame>
        <draw:frame draw:style-name="gr9" draw:text-style-name="P12" draw:layer="layout" svg:width="2.5cm" svg:height="0.725cm" svg:x="8.997cm" svg:y="9.795cm">
          <draw:text-box>
            <text:p text:style-name="P11"><text:span text:style-name="T4">ER</text:span><text:span text:style-name="T4">RO</text:span><text:span text:style-name="T4">R</text:span></text:p>
          </draw:text-box>
        </draw:frame>
        <draw:connector draw:style-name="gr6" draw:text-style-name="P6" draw:layer="layout" draw:type="curve" svg:x1="9.613cm" svg:y1="6.16cm" svg:x2="7.701cm" svg:y2="9.688cm" draw:start-shape="id3" draw:start-glue-point="9" draw:end-shape="id7" draw:end-glue-point="10" svg:d="M9613 6160c0 2352-637 3528-1912 3528" svg:viewBox="0 0 1913 3529">
          <text:p/>
        </draw:connector>
        <draw:connector draw:style-name="gr6" draw:text-style-name="P6" draw:layer="layout" draw:type="curve" svg:x1="4.697cm" svg:y1="14.944cm" svg:x2="4.286cm" svg:y2="11.103cm" draw:start-shape="id6" draw:start-glue-point="6" draw:end-shape="id7" draw:end-glue-point="7" svg:d="M4697 14944c-2319 0-2113-3841-411-3841" svg:viewBox="0 0 1715 3842">
          <text:p/>
        </draw:connector>
        <draw:frame draw:style-name="gr9" draw:text-style-name="P12" draw:layer="layout" svg:width="2.5cm" svg:height="0.725cm" svg:x="7.597cm" svg:y="7.396cm">
          <draw:text-box>
            <text:p text:style-name="P11"><text:span text:style-name="T4">ERROR</text:span></text:p>
          </draw:text-box>
        </draw:frame>
        <draw:frame draw:style-name="gr9" draw:text-style-name="P12" draw:layer="layout" svg:width="2.5cm" svg:height="0.725cm" svg:x="0.897cm" svg:y="12.797cm">
          <draw:text-box>
            <text:p text:style-name="P11"><text:span text:style-name="T4">ER</text:span><text:span text:style-name="T4">RO</text:span><text:span text:style-name="T4">R</text:span></text:p>
          </draw:text-box>
        </draw:frame>
        <draw:frame draw:style-name="gr11" draw:text-style-name="P12" draw:layer="layout" svg:width="1.4cm" svg:height="0.776cm" svg:x="11.897cm" svg:y="4.045cm">
          <draw:text-box>
            <text:p text:style-name="P11"><text:span text:style-name="T4">OK</text:span></text:p>
          </draw:text-box>
        </draw:frame>
        <draw:frame draw:style-name="gr9" draw:text-style-name="P12" draw:layer="layout" svg:width="1.4cm" svg:height="0.725cm" svg:x="13.822cm" svg:y="10.497cm">
          <draw:text-box>
            <text:p text:style-name="P11"><text:span text:style-name="T4">OK</text:span></text:p>
          </draw:text-box>
        </draw:frame>
        <draw:frame draw:style-name="gr9" draw:text-style-name="P12" draw:layer="layout" svg:width="1.4cm" svg:height="0.725cm" svg:x="9.197cm" svg:y="12.798cm">
          <draw:text-box>
            <text:p text:style-name="P11"><text:span text:style-name="T4">OK</text:span></text:p>
          </draw:text-box>
        </draw:frame>
        <draw:frame draw:style-name="gr12" draw:text-style-name="P12" draw:layer="layout" svg:width="2.9cm" svg:height="1.246cm" svg:x="0.197cm" svg:y="7.998cm">
          <draw:text-box>
            <text:p text:style-name="P11"><text:span text:style-name="T4">Rei</text:span><text:span text:style-name="T4">nten</text:span><text:span text:style-name="T4">tos </text:span><text:span text:style-name="T4">cont</text:span><text:span text:style-name="T4">rola</text:span><text:span text:style-name="T4">dos</text:span></text:p>
          </draw:text-box>
        </draw:frame>
        <draw:connector draw:style-name="gr13" draw:text-style-name="P6" draw:layer="layout" draw:type="curve" svg:x1="3.701cm" svg:y1="9.688cm" svg:x2="6.783cm" svg:y2="6.16cm" draw:start-shape="id7" draw:start-glue-point="6" draw:end-shape="id3" draw:end-glue-point="7" svg:d="M3701 9688c-825 0-2366-3528 3082-3528" svg:viewBox="0 0 3932 3529">
          <text:p/>
        </draw:connector>
        <draw:frame draw:style-name="gr10" draw:text-style-name="P12" draw:layer="layout" svg:width="4.15cm" svg:height="1.673cm" svg:x="0.697cm" svg:y="-0.105cm">
          <draw:text-box>
            <text:p text:style-name="P11"><text:span text:style-name="T4">Entry poi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.7cm" fo:page-height="17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6:07.935808570</meta:creation-date>
    <dc:date>2026-06-25T21:21:24.962634872</dc:date>
    <meta:editing-duration>PT26M12S</meta:editing-duration>
    <meta:editing-cycles>4</meta:editing-cycles>
    <meta:generator>LibreOffice/7.3.7.2$Linux_X86_64 LibreOffice_project/30$Build-2</meta:generator>
    <meta:document-statistic meta:object-count="27"/>
  </office:meta>
</office:document-meta>
</file>